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Anonymous Pro" svg:font-family="'Anonymous Pro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Heading_20_2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Code">
      <style:text-properties style:text-underline-style="none"/>
    </style:style>
    <style:style style:name="P4" style:family="paragraph" style:parent-style-name="Heading_20_1">
      <style:paragraph-properties fo:text-align="center" style:justify-single-word="false"/>
      <style:text-properties fo:language="en" fo:country="US" style:text-underline-style="solid" style:text-underline-width="auto" style:text-underline-color="font-color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Basis</text:h>
      <text:h text:style-name="P1" text:outline-level="2"><text:span text:style-name="T2">Data types</text:span></text:h>
      <text:p text:style-name="Code"><text:span text:style-name="T1">sint8 <text:s/>uint8 <text:s/>= byte</text:span></text:p>
      <text:p text:style-name="Code"><text:span text:style-name="T1">sint16 uint16 </text:span></text:p>
      <text:p text:style-name="Code"><text:span text:style-name="T1">sint32 uint32 = <text:s/>int uint</text:span></text:p>
      <text:p text:style-name="Code"><text:span text:style-name="T1">sint64 uint64 = slen ulen</text:span></text:p>
      <text:p text:style-name="Code"><text:span text:style-name="T1"/></text:p>
      <text:h text:style-name="P2" text:outline-level="2"><text:span text:style-name="T1">Registers</text:span></text:h>
      <text:p text:style-name="P3"><text:span text:style-name="T1">R0 – R15 <text:s/>64 bit</text:span></text:p>
      <text:p text:style-name="P3"><text:span text:style-name="T1"/></text:p>
      <text:p text:style-name="P3"><text:span text:style-name="T1">R0</text:span></text:p>
      <text:p text:style-name="P3"><text:span text:style-name="T1">R0.32.0-1</text:span></text:p>
      <text:p text:style-name="P3"><text:span text:style-name="T1">R0.16.0-3</text:span></text:p>
      <text:p text:style-name="P3"><text:span text:style-name="T1">R0.8.0-7</text:span></text:p>
      <text:p text:style-name="Text_20_body"><text:span text:style-name="T1"/></text:p>
      <text:h text:style-name="P4" text:outline-level="1">Special registers</text:h>
      <text:p text:style-name="Code"><text:span text:style-name="T1">PC <text:s text:c="2"/>64 bit</text:span></text:p>
      <text:p text:style-name="Code"><text:span text:style-name="T1">LR <text:s text:c="2"/>64 bit</text:span></text:p>
      <text:p text:style-name="Code"><text:span text:style-name="T1">SP <text:s text:c="2"/>64 bit</text:span></text:p>
      <text:p text:style-name="Code"><text:span text:style-name="T1">BP <text:s text:c="2"/>64 bit</text:span></text:p>
      <text:p text:style-name="Code"><text:span text:style-name="T1">OP <text:s text:c="2"/>64 bit</text:span></text:p>
      <text:p text:style-name="Code"><text:span text:style-name="T1">TBP <text:s/>(ro) <text:s/>64 bit</text:span></text:p>
      <text:p text:style-name="Code"><text:span text:style-name="T1">CTX <text:s/>64 bit <text:s/></text:span></text:p>
      <text:p text:style-name="Code"><text:span text:style-name="T1">CLK <text:s/>(ro)</text:span></text:p>
      <text:p text:style-name="Code"><text:span text:style-name="T1"/></text:p>
      <text:p text:style-name="Code"><text:span text:style-name="T1">F <text:s text:c="6"/>4 bit <text:s/>O C N Z</text:span></text:p>
      <text:p text:style-name="Code"><text:span text:style-name="T1">FLAGS <text:s/>64 bit <text:s/>F.0-15</text:span></text:p>
      <text:p text:style-name="Code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Anonymous Pro" svg:font-family="'Anonymous Pro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class="text">
      <style:paragraph-properties fo:background-color="#e6e6ff">
        <style:background-image/>
      </style:paragraph-properties>
      <style:text-properties style:font-name="Anonymous Pro" fo:font-size="14pt"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rgey Strukov</meta:initial-creator>
    <meta:creation-date>2026-05-28T15:43:18.59</meta:creation-date>
    <meta:generator>OpenOffice/4.1.16$Win32 OpenOffice.org_project/4116m3$Build-9816</meta:generator>
    <dc:date>2026-05-28T16:16:09.60</dc:date>
    <dc:creator>Sergey Strukov</dc:creator>
    <meta:editing-duration>PT32M48S</meta:editing-duration>
    <meta:editing-cycles>6</meta:editing-cycles>
    <meta:document-statistic meta:table-count="0" meta:image-count="0" meta:object-count="0" meta:page-count="1" meta:paragraph-count="23" meta:word-count="66" meta:character-count="306"/>
  </office:meta>
</office:document-meta>
</file>