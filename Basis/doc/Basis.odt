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nonymous Pro1" svg:font-family="'Anonymous Pro'" style:font-family-generic="modern" style:font-pitch="fixed"/>
    <style:font-face style:name="Anonymous Pro" svg:font-family="'Anonymous Pro'" style:font-adornments="Regular" style:font-family-generic="modern" style:font-pitch="fixed"/>
    <style:font-face style:name="Anonymous Pro2" svg:font-family="'Anonymous Pr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de">
      <style:text-properties fo:language="en" fo:country="US"/>
    </style:style>
    <style:style style:name="P2" style:family="paragraph" style:parent-style-name="Code">
      <style:text-properties fo:language="en" fo:country="US" style:text-underline-style="non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text-align="start" style:justify-single-word="false"/>
      <style:text-properties fo:language="en" fo:country="US" style:text-underline-style="none"/>
    </style:style>
    <style:style style:name="P5" style:family="paragraph" style:parent-style-name="Text_20_body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  <style:style style:name="P6" style:family="paragraph" style:parent-style-name="Text_20_body">
      <style:paragraph-properties fo:text-align="start" style:justify-single-word="false"/>
      <style:text-properties fo:language="en" fo:country="US" style:text-underline-style="solid" style:text-underline-width="auto" style:text-underline-color="font-color"/>
    </style:style>
    <style:style style:name="P7" style:family="paragraph" style:parent-style-name="Heading_20_2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  <style:style style:name="P8" style:family="paragraph" style:parent-style-name="Heading_20_2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style:text-properties fo:font-size="12pt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" style:family="paragraph">
      <style:text-properties style:font-name="Anonymous Pro1"/>
    </style:style>
    <style:style style:name="T1" style:family="text">
      <style:text-properties fo:language="ru" fo:country="RU"/>
    </style:style>
    <style:style style:name="T2" style:family="text">
      <style:text-properties fo:font-size="12pt"/>
    </style:style>
    <style:style style:name="T3" style:family="text">
      <style:text-properties style:font-name="Anonymous Pro1"/>
    </style:style>
    <style:style style:name="gr1" style:family="graphic">
      <style:graphic-properties svg:stroke-color="#3333ff" draw:marker-start="Dimension_20_Lines" draw:marker-end="Dimension_20_Lines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3333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Arrow" draw:textarea-horizontal-align="center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Arrow" draw:marker-end="Arrow" draw:textarea-horizontal-align="center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Arrow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start="Dimension_20_Lines" draw:marker-end="Dimension_20_Lines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5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7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4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7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7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6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marker-start="Short_20_line_20_Arrow" draw:marker-end="Short_20_line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marker-start="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marker-start="Arrow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Basis</text:h>
      <text:h text:style-name="P7" text:outline-level="2">Data types</text:h>
      <text:p text:style-name="P4"><draw:line text:anchor-type="paragraph" draw:z-index="0" draw:style-name="gr1" draw:text-style-name="P10" svg:x1="0.351cm" svg:y1="0.45cm" svg:x2="1.351cm" svg:y2="0.45cm"><text:p/></draw:line></text:p>
      <text:p text:style-name="P4"><draw:line text:anchor-type="paragraph" draw:z-index="1" draw:style-name="gr1" draw:text-style-name="P10" svg:x1="0.351cm" svg:y1="0.483cm" svg:x2="2.351cm" svg:y2="0.483cm"><text:p/></draw:line></text:p>
      <text:p text:style-name="P4"/>
      <text:p text:style-name="P4"><draw:line text:anchor-type="paragraph" draw:z-index="2" draw:style-name="gr1" draw:text-style-name="P10" svg:x1="0.369cm" svg:y1="-0.152cm" svg:x2="4.37cm" svg:y2="-0.152cm"><text:p/></draw:line></text:p>
      <text:p text:style-name="P4"><draw:line text:anchor-type="paragraph" draw:z-index="3" draw:style-name="gr1" draw:text-style-name="P10" svg:x1="0.367cm" svg:y1="-0.152cm" svg:x2="8.366cm" svg:y2="-0.152cm"><text:p/></draw:line></text:p>
      <text:p text:style-name="P1">sint8 <text:s/>uint8 <text:s/>= byte</text:p>
      <text:p text:style-name="P1">sint16 uint16 </text:p>
      <text:p text:style-name="P1">sint32 uint32 = <text:s/>int uint</text:p>
      <text:p text:style-name="P1">sint64 uint64 = slen ulen</text:p>
      <text:h text:style-name="P7" text:outline-level="2">Registers</text:h>
      <text:p text:style-name="P5"><draw:line text:anchor-type="paragraph" draw:z-index="4" draw:style-name="gr1" draw:text-style-name="P10" svg:x1="0.367cm" svg:y1="0.388cm" svg:x2="8.366cm" svg:y2="0.388cm"><text:p/></draw:line></text:p>
      <text:p text:style-name="P5"><draw:line text:anchor-type="paragraph" draw:z-index="5" draw:style-name="gr1" draw:text-style-name="P10" svg:x1="0.369cm" svg:y1="0.264cm" svg:x2="4.37cm" svg:y2="0.264cm"><text:p/></draw:line><draw:line text:anchor-type="paragraph" draw:z-index="6" draw:style-name="gr1" draw:text-style-name="P10" svg:x1="4.369cm" svg:y1="0.264cm" svg:x2="8.37cm" svg:y2="0.264cm"><text:p/></draw:line></text:p>
      <text:p text:style-name="P5"><draw:line text:anchor-type="paragraph" draw:z-index="7" draw:style-name="gr1" draw:text-style-name="P10" svg:x1="0.369cm" svg:y1="0.201cm" svg:x2="2.369cm" svg:y2="0.201cm"><text:p/></draw:line><draw:line text:anchor-type="paragraph" draw:z-index="8" draw:style-name="gr1" draw:text-style-name="P10" svg:x1="2.369cm" svg:y1="0.201cm" svg:x2="4.369cm" svg:y2="0.201cm"><text:p/></draw:line><draw:line text:anchor-type="paragraph" draw:z-index="9" draw:style-name="gr1" draw:text-style-name="P10" svg:x1="4.369cm" svg:y1="0.201cm" svg:x2="6.369cm" svg:y2="0.201cm"><text:p/></draw:line><draw:line text:anchor-type="paragraph" draw:z-index="10" draw:style-name="gr1" draw:text-style-name="P10" svg:x1="6.369cm" svg:y1="0.201cm" svg:x2="8.369cm" svg:y2="0.201cm"><text:p/></draw:line></text:p>
      <text:p text:style-name="P5"><draw:line text:anchor-type="paragraph" draw:z-index="19" draw:style-name="gr1" draw:text-style-name="P10" svg:x1="0.386cm" svg:y1="0.185cm" svg:x2="1.386cm" svg:y2="0.185cm"><text:p/></draw:line><draw:line text:anchor-type="paragraph" draw:z-index="20" draw:style-name="gr1" draw:text-style-name="P10" svg:x1="1.386cm" svg:y1="0.185cm" svg:x2="2.386cm" svg:y2="0.185cm"><text:p/></draw:line><draw:line text:anchor-type="paragraph" draw:z-index="21" draw:style-name="gr1" draw:text-style-name="P10" svg:x1="2.387cm" svg:y1="0.185cm" svg:x2="3.387cm" svg:y2="0.185cm"><text:p/></draw:line><draw:line text:anchor-type="paragraph" draw:z-index="22" draw:style-name="gr1" draw:text-style-name="P10" svg:x1="3.297cm" svg:y1="0.185cm" svg:x2="4.297cm" svg:y2="0.185cm"><text:p/></draw:line><draw:line text:anchor-type="paragraph" draw:z-index="23" draw:style-name="gr1" draw:text-style-name="P10" svg:x1="4.297cm" svg:y1="0.185cm" svg:x2="5.297cm" svg:y2="0.185cm"><text:p/></draw:line><draw:line text:anchor-type="paragraph" draw:z-index="24" draw:style-name="gr1" draw:text-style-name="P10" svg:x1="5.297cm" svg:y1="0.185cm" svg:x2="6.297cm" svg:y2="0.185cm"><text:p/></draw:line><draw:line text:anchor-type="paragraph" draw:z-index="25" draw:style-name="gr1" draw:text-style-name="P10" svg:x1="6.297cm" svg:y1="0.185cm" svg:x2="7.297cm" svg:y2="0.185cm"><text:p/></draw:line><draw:line text:anchor-type="paragraph" draw:z-index="26" draw:style-name="gr1" draw:text-style-name="P10" svg:x1="7.297cm" svg:y1="0.185cm" svg:x2="8.297cm" svg:y2="0.185cm"><text:p/></draw:line></text:p>
      <text:p text:style-name="P2">R0 – R15 <text:s/>64 bit</text:p>
      <text:p text:style-name="P2"/>
      <text:p text:style-name="P2">R0</text:p>
      <text:p text:style-name="P2">R0.32.0-1</text:p>
      <text:p text:style-name="P2">R0.16.0-3</text:p>
      <text:p text:style-name="P2">R0.8.0-7</text:p>
      <text:p text:style-name="P3"/>
      <text:h text:style-name="P8" text:outline-level="2">Special registers</text:h>
      <text:p text:style-name="P1">PC <text:s text:c="2"/>64 bit <text:s text:c="8"/>processor counter</text:p>
      <text:p text:style-name="P1">LR <text:s text:c="2"/>64 bit <text:s text:c="8"/>link register</text:p>
      <text:p text:style-name="P1">SP <text:s text:c="2"/>64 bit <text:s text:c="8"/>stack pointer</text:p>
      <text:p text:style-name="P1">BP <text:s text:c="2"/>64 bit <text:s text:c="8"/>base pointer</text:p>
      <text:p text:style-name="P1">OP <text:s text:c="2"/>64 bit <text:s text:c="8"/>object pointer</text:p>
      <text:p text:style-name="P1">CTX <text:s/>64 bit <text:s text:c="8"/>context</text:p>
      <text:p text:style-name="P1"><text:soft-page-break/>TBP <text:s/>(ro) <text:s/>64 bit <text:s text:c="2"/>thread base pointer</text:p>
      <text:p text:style-name="P1">CLK <text:s/>(ro) <text:s text:c="10"/>CPU clock counter</text:p>
      <text:p text:style-name="P1"/>
      <text:p text:style-name="P1">F <text:s text:c="6"/>4 bit <text:s/>O C N Z</text:p>
      <text:p text:style-name="P1">FLAGS <text:s/>64 bit <text:s/>F.0-15</text:p>
      <text:p text:style-name="P1"><text:s text:c="7"/>F.0-7 <text:s text:c="2"/>immediate</text:p>
      <text:p text:style-name="P1"><text:s text:c="7"/>F.8-15 <text:s/>sticky</text:p>
      <text:p text:style-name="P1"><text:s text:c="7"/>F.0.C <text:s text:c="2"/>bit C in<text:span text:style-name="T1"> </text:span>flag block<text:span text:style-name="T1"> </text:span>0 <text:tab/></text:p>
      <text:p text:style-name="Text_20_body"/>
      <text:p text:style-name="Text_20_body"><draw:line text:anchor-type="paragraph" draw:z-index="11" draw:style-name="gr1" draw:text-style-name="P10" svg:x1="0.457cm" svg:y1="0.067cm" svg:x2="5.29cm" svg:y2="0.067cm"><text:p/></draw:line><draw:frame text:anchor-type="paragraph" draw:z-index="12" draw:style-name="gr2" svg:width="0.512cm" svg:height="0.6cm" svg:x="0.933cm" svg:y="0.208cm"><draw:text-box><text:p>O</text:p></draw:text-box></draw:frame><draw:frame text:anchor-type="paragraph" draw:z-index="13" draw:style-name="gr3" svg:width="0.565cm" svg:height="0.548cm" svg:x="2.08cm" svg:y="0.226cm"><draw:text-box><text:p>C</text:p></draw:text-box></draw:frame><draw:frame text:anchor-type="paragraph" draw:z-index="15" draw:style-name="gr5" svg:width="0.459cm" svg:height="0.689cm" svg:x="4.531cm" svg:y="0.261cm"><draw:text-box><text:p>Z</text:p></draw:text-box></draw:frame><draw:frame text:anchor-type="paragraph" draw:z-index="14" draw:style-name="gr4" draw:text-style-name="P11" svg:width="0.551cm" svg:height="0.489cm" svg:x="3.314cm" svg:y="0.243cm"><draw:text-box><text:p><text:span text:style-name="T2">N</text:span></text:p></draw:text-box></draw:frame><draw:line text:anchor-type="paragraph" draw:z-index="16" draw:style-name="gr6" draw:text-style-name="P10" svg:x1="1.63cm" svg:y1="0.208cm" svg:x2="1.63cm" svg:y2="-0.057cm"><text:p/></draw:line></text:p>
      <text:p text:style-name="P3"><draw:line text:anchor-type="paragraph" draw:z-index="18" draw:style-name="gr6" draw:text-style-name="P10" svg:x1="4.119cm" svg:y1="-0.51cm" svg:x2="4.119cm" svg:y2="-0.775cm"><text:p/></draw:line><draw:line text:anchor-type="paragraph" draw:z-index="17" draw:style-name="gr6" draw:text-style-name="P10" svg:x1="2.917cm" svg:y1="-0.497cm" svg:x2="2.917cm" svg:y2="-0.762cm"><text:p/></draw:line></text:p>
      <text:h text:style-name="P7" text:outline-level="2">Ordinary commands</text:h>
      <text:p text:style-name="P3"/>
      <text:p text:style-name="P1">Rdst = Csrc</text:p>
      <text:p text:style-name="P1">Rdst = unop RCsrc</text:p>
      <text:p text:style-name="P1">Rdst = RCsrc1 binop RCsrc2</text:p>
      <text:p text:style-name="P1"/>
      <text:p text:style-name="P1">[Cond] Rdst = RCsrc1 binop RCsrc2</text:p>
      <text:p text:style-name="P1">Rdst,F.0 = RCsrc1 binop RCsrc2</text:p>
      <text:p text:style-name="P3"/>
      <text:p text:style-name="P1">jmp RCsrc</text:p>
      <text:p text:style-name="P1">jmp PC+Csrc</text:p>
      <text:p text:style-name="P1"/>
      <text:p text:style-name="P1">call RCsrc</text:p>
      <text:p text:style-name="P1">call PC+Csrc</text:p>
      <text:p text:style-name="P1"/>
      <text:p text:style-name="P1">ret</text:p>
      <text:p text:style-name="P3"/>
      <text:p text:style-name="P1">Dst <text:s/>= RCsrc</text:p>
      <text:p text:style-name="P1">Rdst = Src</text:p>
      <text:p text:style-name="P1"/>
      <text:p text:style-name="P1"><text:soft-page-break/>Dst = *Src</text:p>
      <text:p text:style-name="P1">Dst = *(Src+RCsrc)</text:p>
      <text:p text:style-name="P1">Dst = *(Src+Csrc*Rsrc)</text:p>
      <text:p text:style-name="P1">Dst = *(Src+Csrc*Rsrc+Csrc)</text:p>
      <text:p text:style-name="P1"/>
      <text:p text:style-name="P1">*Dst <text:s text:c="18"/>= Src</text:p>
      <text:p text:style-name="P1">*(Dst+RCdst) <text:s text:c="10"/>= Src</text:p>
      <text:p text:style-name="P1">*(Dst+Cdst*RCdst) <text:s text:c="5"/>= Src</text:p>
      <text:p text:style-name="P1">*(Dst+Cdst*Rdst+Cdst) <text:s/>= Src</text:p>
      <text:p text:style-name="Text_20_body"/>
      <text:h text:style-name="P7" text:outline-level="2">Memory</text:h>
      <text:p text:style-name="Text_20_body"><draw:rect text:anchor-type="paragraph" draw:z-index="27" draw:style-name="gr7" draw:text-style-name="P10" svg:width="3.864cm" svg:height="4.64cm" svg:x="0.492cm" svg:y="0.37cm"><text:p text:style-name="P10">Core</text:p></draw:rect><draw:rect text:anchor-type="paragraph" draw:z-index="28" draw:style-name="gr7" draw:text-style-name="P10" svg:width="3.846cm" svg:height="4.64cm" svg:x="6.419cm" svg:y="0.37cm"><text:p text:style-name="P10">VM</text:p></draw:rect><draw:rect text:anchor-type="paragraph" draw:z-index="29" draw:style-name="gr7" draw:text-style-name="P10" svg:width="4.269cm" svg:height="4.675cm" svg:x="12.293cm" svg:y="0.37cm"><text:p text:style-name="P10">L1</text:p></draw:rect></text:p>
      <text:p text:style-name="Text_20_body"><draw:line text:anchor-type="paragraph" draw:z-index="30" draw:style-name="gr8" draw:text-style-name="P12" svg:x1="4.355cm" svg:y1="0.642cm" svg:x2="6.419cm" svg:y2="0.642cm"><text:p text:style-name="P12">S</text:p></draw:line></text:p>
      <text:p text:style-name="Text_20_body"><draw:line text:anchor-type="paragraph" draw:z-index="33" draw:style-name="gr8" draw:text-style-name="P12" svg:x1="10.264cm" svg:y1="-0.046cm" svg:x2="12.328cm" svg:y2="-0.046cm"><text:p text:style-name="P12">S</text:p></draw:line></text:p>
      <text:p text:style-name="Text_20_body"><draw:line text:anchor-type="paragraph" draw:z-index="31" draw:style-name="gr8" draw:text-style-name="P10" svg:x1="4.355cm" svg:y1="0.647cm" svg:x2="6.419cm" svg:y2="0.647cm"><text:p text:style-name="P12">VA</text:p></draw:line></text:p>
      <text:p text:style-name="Text_20_body"><draw:line text:anchor-type="paragraph" draw:z-index="34" draw:style-name="gr8" draw:text-style-name="P10" svg:x1="10.264cm" svg:y1="-0.005cm" svg:x2="12.328cm" svg:y2="-0.005cm"><text:p text:style-name="P12">PA</text:p></draw:line></text:p>
      <text:p text:style-name="Text_20_body"/>
      <text:p text:style-name="Text_20_body"><draw:line text:anchor-type="paragraph" draw:z-index="32" draw:style-name="gr9" draw:text-style-name="P10" svg:x1="4.355cm" svg:y1="0.131cm" svg:x2="6.419cm" svg:y2="0.131cm"><text:p text:style-name="P12">D</text:p></draw:line><draw:line text:anchor-type="paragraph" draw:z-index="35" draw:style-name="gr9" draw:text-style-name="P10" svg:x1="10.229cm" svg:y1="0.095cm" svg:x2="12.293cm" svg:y2="0.095cm"><text:p text:style-name="P12">D</text:p></draw:line></text:p>
      <text:p text:style-name="Text_20_body"/>
      <text:p text:style-name="P1">S = Code Data ROData</text:p>
      <text:p text:style-name="Text_20_body"><draw:rect text:anchor-type="paragraph" draw:z-index="36" draw:style-name="gr7" draw:text-style-name="P10" svg:width="3.846cm" svg:height="2.1cm" svg:x="0.422cm" svg:y="0.684cm"><text:p text:style-name="P10">L1</text:p></draw:rect></text:p>
      <text:p text:style-name="Text_20_body"><draw:rect text:anchor-type="paragraph" draw:z-index="40" draw:style-name="gr7" draw:text-style-name="P10" svg:width="4.463cm" svg:height="7.233cm" svg:x="12.01cm" svg:y="0.004cm"><text:p text:style-name="P10">Mem</text:p></draw:rect></text:p>
      <text:p text:style-name="Text_20_body"><draw:line text:anchor-type="paragraph" draw:z-index="43" draw:style-name="gr10" draw:text-style-name="P10" svg:x1="4.267cm" svg:y1="0.522cm" svg:x2="6.701cm" svg:y2="2.162cm"><text:p/></draw:line></text:p>
      <text:p text:style-name="Text_20_body"><draw:rect text:anchor-type="paragraph" draw:z-index="39" draw:style-name="gr7" draw:text-style-name="P10" svg:width="3.176cm" svg:height="4.093cm" svg:x="6.701cm" svg:y="0.423cm"><text:p text:style-name="P10">MPX</text:p></draw:rect></text:p>
      <text:p text:style-name="Text_20_body"><draw:rect text:anchor-type="paragraph" draw:z-index="37" draw:style-name="gr7" draw:text-style-name="P10" svg:width="3.793cm" svg:height="1.959cm" svg:x="0.474cm" svg:y="0.572cm"><text:p text:style-name="P10">L1</text:p></draw:rect></text:p>
      <text:p text:style-name="Text_20_body"/>
      <text:p text:style-name="Text_20_body"><draw:line text:anchor-type="paragraph" draw:z-index="41" draw:style-name="gr10" draw:text-style-name="P10" svg:x1="9.875cm" svg:y1="0.321cm" svg:x2="12.01cm" svg:y2="0.321cm"><text:p/></draw:line><draw:line text:anchor-type="paragraph" draw:z-index="42" draw:style-name="gr10" draw:text-style-name="P10" svg:x1="4.267cm" svg:y1="0.127cm" svg:x2="6.701cm" svg:y2="0.127cm"><text:p/></draw:line></text:p>
      <text:p text:style-name="Text_20_body"><draw:line text:anchor-type="paragraph" draw:z-index="44" draw:style-name="gr10" draw:text-style-name="P10" svg:x1="4.284cm" svg:y1="2.092cm" svg:x2="6.701cm" svg:y2="0.31cm"><text:p/></draw:line></text:p>
      <text:p text:style-name="Text_20_body"><draw:rect text:anchor-type="paragraph" draw:z-index="38" draw:style-name="gr7" draw:text-style-name="P10" svg:width="3.811cm" svg:height="2.082cm" svg:x="0.474cm" svg:y="0.335cm"><text:p text:style-name="P10">L1</text:p></draw:rect></text:p>
      <text:p text:style-name="Text_20_body"/>
      <text:p text:style-name="Text_20_body"/>
      <text:p text:style-name="Text_20_body"/>
      <text:p text:style-name="Text_20_body"/>
      <text:p text:style-name="P1"><text:soft-page-break/>Cache line = 64 byte = 8 Reg</text:p>
      <text:p text:style-name="Text_20_body"/>
      <text:h text:style-name="P7" text:outline-level="2">Address space</text:h>
      <text:p text:style-name="P4"><draw:frame text:anchor-type="paragraph" draw:z-index="55" draw:style-name="gr2" svg:width="2.029cm" svg:height="0.6cm" svg:x="1.833cm" svg:y="-0.106cm"><draw:text-box><text:p>BootROM</text:p></draw:text-box></draw:frame><draw:frame text:anchor-type="paragraph" draw:z-index="56" draw:style-name="gr17" svg:width="1.712cm" svg:height="0.53cm" svg:x="3.385cm" svg:y="0.335cm"><draw:text-box><text:p>Registers</text:p></draw:text-box></draw:frame><draw:frame text:anchor-type="paragraph" draw:z-index="57" draw:style-name="gr5" svg:width="1.394cm" svg:height="0.689cm" svg:x="7.089cm" svg:y="0.282cm"><draw:text-box><text:p>RAM</text:p></draw:text-box></draw:frame><draw:frame text:anchor-type="paragraph" draw:z-index="58" draw:style-name="gr18" svg:width="1.024cm" svg:height="0.495cm" svg:x="13.157cm" svg:y="0.318cm"><draw:text-box><text:p>Dev</text:p></draw:text-box></draw:frame></text:p>
      <text:p text:style-name="P4"><draw:line text:anchor-type="paragraph" draw:z-index="45" draw:style-name="gr11" draw:text-style-name="P10" svg:x1="0.474cm" svg:y1="0.201cm" svg:x2="16.684cm" svg:y2="0.201cm"><text:p/></draw:line><draw:frame text:anchor-type="paragraph" draw:z-index="46" draw:style-name="gr12" svg:width="0.636cm" svg:height="0.565cm" svg:x="1.039cm" svg:y="0.201cm"><draw:text-box><text:p>4M</text:p></draw:text-box></draw:frame><draw:frame text:anchor-type="paragraph" draw:z-index="47" draw:style-name="gr13" svg:width="0.724cm" svg:height="0.583cm" svg:x="2.432cm" svg:y="0.201cm"><draw:text-box><text:p>4M</text:p></draw:text-box></draw:frame><draw:frame text:anchor-type="paragraph" draw:z-index="48" draw:style-name="gr14" svg:width="0.83cm" svg:height="0.671cm" svg:x="3.808cm" svg:y="0.201cm"><draw:text-box><text:p>4M</text:p></draw:text-box></draw:frame><draw:frame text:anchor-type="paragraph" draw:z-index="49" draw:style-name="gr15" svg:width="0.812cm" svg:height="0.706cm" svg:x="7.424cm" svg:y="0.201cm"><draw:text-box><text:p>4T</text:p></draw:text-box></draw:frame><draw:frame text:anchor-type="paragraph" draw:z-index="50" draw:style-name="gr14" svg:width="0.777cm" svg:height="0.671cm" svg:x="13.51cm" svg:y="0.201cm"><draw:text-box><text:p>4T</text:p></draw:text-box></draw:frame><draw:line text:anchor-type="paragraph" draw:z-index="51" draw:style-name="gr16" draw:text-style-name="P10" svg:x1="2.027cm" svg:y1="0.042cm" svg:x2="2.027cm" svg:y2="0.412cm"><text:p/></draw:line><draw:line text:anchor-type="paragraph" draw:z-index="52" draw:style-name="gr16" draw:text-style-name="P10" svg:x1="3.526cm" svg:y1="0.007cm" svg:x2="3.526cm" svg:y2="0.395cm"><text:p/></draw:line><draw:line text:anchor-type="paragraph" draw:z-index="53" draw:style-name="gr16" draw:text-style-name="P10" svg:x1="4.955cm" svg:y1="0.007cm" svg:x2="4.955cm" svg:y2="0.377cm"><text:p/></draw:line><draw:line text:anchor-type="paragraph" draw:z-index="54" draw:style-name="gr16" draw:text-style-name="P10" svg:x1="10.811cm" svg:y1="0.007cm" svg:x2="10.829cm" svg:y2="0.43cm"><text:p/></draw:line><draw:rect text:anchor-type="paragraph" draw:z-index="59" draw:style-name="gr19" draw:text-style-name="P10" svg:width="1.518cm" svg:height="0.389cm" svg:x="0.51cm" svg:y="-0.205cm"><text:p/></draw:rect></text:p>
      <text:p text:style-name="P4"/>
      <text:h text:style-name="P7" text:outline-level="2">Process</text:h>
      <text:p text:style-name="P4"><draw:line text:anchor-type="paragraph" draw:z-index="61" draw:style-name="gr16" draw:text-style-name="P10" svg:x1="5.484cm" svg:y1="0.3cm" svg:x2="5.484cm" svg:y2="0.706cm"><text:p/></draw:line><draw:line text:anchor-type="paragraph" draw:z-index="62" draw:style-name="gr16" draw:text-style-name="P10" svg:x1="7.618cm" svg:y1="0.3cm" svg:x2="7.618cm" svg:y2="0.688cm"><text:p/></draw:line><draw:line text:anchor-type="paragraph" draw:z-index="66" draw:style-name="gr16" draw:text-style-name="P10" svg:x1="2.397cm" svg:y1="0.335cm" svg:x2="2.397cm" svg:y2="0.705cm"><text:p/></draw:line><draw:line text:anchor-type="paragraph" draw:z-index="68" draw:style-name="gr16" draw:text-style-name="P10" svg:x1="4.337cm" svg:y1="0.3cm" svg:x2="4.337cm" svg:y2="0.723cm"><text:p/></draw:line></text:p>
      <text:p text:style-name="P4"><draw:line text:anchor-type="paragraph" draw:z-index="60" draw:style-name="gr11" draw:text-style-name="P10" svg:x1="0.686cm" svg:y1="-0.188cm" svg:x2="15.891cm" svg:y2="-0.187cm"><text:p/></draw:line><draw:frame text:anchor-type="paragraph" draw:z-index="63" draw:style-name="gr20" svg:width="1.041cm" svg:height="0.724cm" svg:x="2.891cm" svg:y="-0.169cm"><draw:text-box><text:p>Stack</text:p></draw:text-box></draw:frame><draw:frame text:anchor-type="paragraph" draw:z-index="64" draw:style-name="gr13" svg:width="1.235cm" svg:height="0.583cm" svg:x="6.084cm" svg:y="-0.169cm"><draw:text-box><text:p>Code</text:p></draw:text-box></draw:frame><draw:frame text:anchor-type="paragraph" draw:z-index="65" draw:style-name="gr4" svg:width="1.077cm" svg:height="0.489cm" svg:x="11.269cm" svg:y="-0.205cm"><draw:text-box><text:p>Data</text:p></draw:text-box></draw:frame><draw:frame text:anchor-type="paragraph" draw:z-index="67" draw:style-name="gr21" svg:width="1.5cm" svg:height="0.759cm" svg:x="0.898cm" svg:y="-0.169cm"><draw:text-box><text:p>ROData</text:p></draw:text-box></draw:frame><draw:frame text:anchor-type="paragraph" draw:z-index="69" draw:style-name="gr22" svg:width="0.918cm" svg:height="0.653cm" svg:x="4.514cm" svg:y="-0.169cm"><draw:text-box><text:p>TVS</text:p></draw:text-box></draw:frame></text:p>
      <text:p text:style-name="P4"><draw:line text:anchor-type="paragraph" draw:z-index="71" draw:style-name="gr16" draw:text-style-name="P10" svg:x1="1.956cm" svg:y1="0.385cm" svg:x2="1.956cm" svg:y2="0.826cm"><text:p/></draw:line><draw:line text:anchor-type="paragraph" draw:z-index="72" draw:style-name="gr16" draw:text-style-name="P10" svg:x1="7.643cm" svg:y1="0.367cm" svg:x2="7.643cm" svg:y2="0.896cm"><text:p/></draw:line><draw:rect text:anchor-type="paragraph" draw:z-index="75" draw:style-name="gr19" draw:text-style-name="P10" svg:width="1.253cm" svg:height="0.468cm" svg:x="0.704cm" svg:y="0.12cm"><text:p/></draw:rect></text:p>
      <text:p text:style-name="P4"><draw:line text:anchor-type="paragraph" draw:z-index="70" draw:style-name="gr11" draw:text-style-name="P10" svg:x1="0.65cm" svg:y1="-0.111cm" svg:x2="9.065cm" svg:y2="-0.111cm"><text:p/></draw:line><draw:frame text:anchor-type="paragraph" draw:z-index="73" draw:style-name="gr23" svg:width="1.43cm" svg:height="0.618cm" svg:x="4.443cm" svg:y="-0.111cm"><draw:text-box><text:p>Stack</text:p></draw:text-box></draw:frame><draw:frame text:anchor-type="paragraph" draw:z-index="74" draw:style-name="gr24" svg:width="0.989cm" svg:height="0.512cm" svg:x="7.971cm" svg:y="-0.111cm"><draw:text-box><text:p>TVS</text:p></draw:text-box></draw:frame></text:p>
      <text:p text:style-name="P4"/>
      <text:p text:style-name="P1">Page aligned, page size = 4K</text:p>
      <text:p text:style-name="P4"/>
      <text:h text:style-name="P7" text:outline-level="2">VMT</text:h>
      <text:p text:style-name="P4"><draw:line text:anchor-type="paragraph" draw:z-index="102" draw:style-name="gr11" draw:text-style-name="P10" svg:x1="1.621cm" svg:y1="0.42cm" svg:x2="6.789cm" svg:y2="0.42cm"><text:p/></draw:line><draw:line text:anchor-type="paragraph" draw:z-index="103" draw:style-name="gr16" draw:text-style-name="P10" svg:x1="4.438cm" svg:y1="0.226cm" svg:x2="4.438cm" svg:y2="0.632cm"><text:p/></draw:line><draw:frame text:anchor-type="paragraph" draw:z-index="105" draw:style-name="gr14" svg:width="1.341cm" svg:height="0.671cm" svg:x="2.803cm" svg:y="-0.162cm"><draw:text-box><text:p>hpage</text:p></draw:text-box></draw:frame><draw:frame text:anchor-type="paragraph" draw:z-index="106" draw:style-name="gr23" svg:width="1.006cm" svg:height="0.618cm" svg:x="4.531cm" svg:y="-0.109cm"><draw:text-box><text:p>page</text:p></draw:text-box></draw:frame><draw:frame text:anchor-type="paragraph" draw:z-index="107" draw:style-name="gr18" svg:width="1.006cm" svg:height="0.495cm" svg:x="5.784cm" svg:y="-0.074cm"><draw:text-box><text:p>off</text:p></draw:text-box></draw:frame><draw:frame text:anchor-type="paragraph" draw:z-index="111" draw:style-name="gr13" svg:width="2.682cm" svg:height="0.583cm" svg:x="8.024cm" svg:y="0.12cm"><draw:text-box><text:p>Address split</text:p></draw:text-box></draw:frame><draw:line text:anchor-type="paragraph" draw:z-index="139" draw:style-name="gr16" draw:text-style-name="P10" svg:x1="2.071cm" svg:y1="0.614cm" svg:x2="2.071cm" svg:y2="0.314cm"><text:p/></draw:line><draw:frame text:anchor-type="paragraph" draw:z-index="142" draw:style-name="gr23" svg:width="0.354cm" svg:height="0.618cm" svg:x="1.718cm" svg:y="-0.162cm"><draw:text-box><text:p>S</text:p></draw:text-box></draw:frame></text:p>
      <text:p text:style-name="P4"><draw:line text:anchor-type="paragraph" draw:z-index="104" draw:style-name="gr16" draw:text-style-name="P10" svg:x1="5.634cm" svg:y1="-0.084cm" svg:x2="5.634cm" svg:y2="-0.455cm"><text:p/></draw:line><draw:frame text:anchor-type="paragraph" draw:z-index="108" draw:style-name="gr4" svg:width="0.83cm" svg:height="0.489cm" svg:x="4.69cm" svg:y="0.062cm"><draw:text-box><text:p>12</text:p></draw:text-box></draw:frame><draw:frame text:anchor-type="paragraph" draw:z-index="109" draw:style-name="gr4" svg:width="0.689cm" svg:height="0.489cm" svg:x="5.854cm" svg:y="0.021cm"><draw:text-box><text:p>12</text:p></draw:text-box></draw:frame><draw:frame text:anchor-type="paragraph" draw:z-index="140" draw:style-name="gr24" svg:width="0.918cm" svg:height="0.512cm" svg:x="2.926cm" svg:y="0.004cm"><draw:text-box><text:p>39</text:p></draw:text-box></draw:frame><draw:frame text:anchor-type="paragraph" draw:z-index="141" draw:style-name="gr4" draw:text-style-name="P11" svg:width="0.512cm" svg:height="0.489cm" svg:x="1.78cm" svg:y="0.004cm"><draw:text-box><text:p><text:span text:style-name="T2">1</text:span></text:p></draw:text-box></draw:frame></text:p>
      <text:p text:style-name="P4"/>
      <text:p text:style-name="P4"><draw:line text:anchor-type="paragraph" draw:z-index="110" draw:style-name="gr11" draw:text-style-name="P10" svg:x1="1.621cm" svg:y1="0.582cm" svg:x2="14.956cm" svg:y2="0.582cm"><text:p/></draw:line><draw:frame text:anchor-type="paragraph" draw:z-index="114" draw:style-name="gr22" svg:width="0.742cm" svg:height="0.653cm" svg:x="1.815cm" svg:y="-0.071cm"><draw:text-box><text:p>Len</text:p></draw:text-box></draw:frame><draw:frame text:anchor-type="paragraph" draw:z-index="115" draw:style-name="gr3" svg:width="1.729cm" svg:height="0.548cm" svg:x="2.926cm" svg:y="-0.106cm"><draw:text-box><text:p>HPEntry</text:p></draw:text-box></draw:frame><draw:line text:anchor-type="paragraph" draw:z-index="117" draw:style-name="gr16" draw:text-style-name="P10" svg:x1="7.645cm" svg:y1="0.741cm" svg:x2="7.645cm" svg:y2="0.441cm"><text:p/></draw:line><draw:frame text:anchor-type="paragraph" draw:z-index="118" draw:style-name="gr13" svg:width="1.694cm" svg:height="0.583cm" svg:x="5.872cm" svg:y="-0.071cm"><draw:text-box><text:p>HPEntry</text:p></draw:text-box></draw:frame><draw:frame text:anchor-type="paragraph" draw:z-index="121" draw:style-name="gr3" svg:width="1.518cm" svg:height="0.548cm" svg:x="10.335cm" svg:y="0.035cm"><draw:text-box><text:p>PEntry[]</text:p></draw:text-box></draw:frame></text:p>
      <text:p text:style-name="P4"><draw:line text:anchor-type="paragraph" draw:z-index="112" draw:style-name="gr16" draw:text-style-name="P10" svg:x1="2.679cm" svg:y1="-0.275cm" svg:x2="2.679cm" svg:y2="0.078cm"><text:p/></draw:line><draw:line text:anchor-type="paragraph" draw:z-index="113" draw:style-name="gr16" draw:text-style-name="P10" svg:x1="4.743cm" svg:y1="-0.292cm" svg:x2="4.743cm" svg:y2="0.096cm"><text:p/></draw:line><draw:line text:anchor-type="paragraph" draw:z-index="116" draw:style-name="gr16" draw:text-style-name="P10" svg:x1="5.757cm" svg:y1="0.095cm" svg:x2="5.757cm" svg:y2="-0.311cm"><text:p/></draw:line></text:p>
      <text:p text:style-name="P4"><draw:line text:anchor-type="paragraph" draw:z-index="119" draw:style-name="gr26" draw:text-style-name="P10" svg:x1="2.644cm" svg:y1="0.138cm" svg:x2="7.706cm" svg:y2="0.12cm"><text:p/></draw:line><draw:frame text:anchor-type="paragraph" draw:z-index="120" draw:style-name="gr2" svg:width="1.094cm" svg:height="0.6cm" svg:x="4.725cm" svg:y="0.279cm"><draw:text-box><text:p>Len</text:p></draw:text-box></draw:frame></text:p>
      <text:p text:style-name="P4"/>
      <text:p text:style-name="P4"><draw:frame text:anchor-type="paragraph" draw:z-index="125" draw:style-name="gr27" svg:width="3.29cm" svg:height="0.976cm" svg:x="1.639cm" svg:y="-0.18cm"><draw:text-box><text:p>Base/PEntryBase</text:p></draw:text-box></draw:frame><draw:frame text:anchor-type="paragraph" draw:z-index="126" draw:style-name="gr4" svg:width="0.83cm" svg:height="0.489cm" svg:x="5.925cm" svg:y="0.307cm"><draw:text-box><text:p>Len</text:p></draw:text-box></draw:frame><draw:frame text:anchor-type="paragraph" draw:z-index="127" draw:style-name="gr22" svg:width="1.024cm" svg:height="0.653cm" svg:x="7.865cm" svg:y="0.328cm"><draw:text-box><text:p>Flags</text:p></draw:text-box></draw:frame><draw:frame text:anchor-type="paragraph" draw:z-index="130" draw:style-name="gr27" svg:width="1.941cm" svg:height="0.976cm" svg:x="9.999cm" svg:y="0.416cm"><draw:text-box><text:p>HPEntry</text:p><text:p/></draw:text-box></draw:frame></text:p>
      <text:p text:style-name="P4"><draw:line text:anchor-type="paragraph" draw:z-index="122" draw:style-name="gr11" draw:text-style-name="P10" svg:x1="1.638cm" svg:y1="0.097cm" svg:x2="8.959cm" svg:y2="0.097cm"><text:p/></draw:line><draw:line text:anchor-type="paragraph" draw:z-index="123" draw:style-name="gr16" draw:text-style-name="P10" svg:x1="4.77cm" svg:y1="0.318cm" svg:x2="4.77cm" svg:y2="-0.088cm"><text:p/></draw:line><draw:line text:anchor-type="paragraph" draw:z-index="124" draw:style-name="gr16" draw:text-style-name="P10" svg:x1="7.715cm" svg:y1="0.317cm" svg:x2="7.715cm" svg:y2="-0.071cm"><text:p/></draw:line><draw:frame text:anchor-type="paragraph" draw:z-index="128" draw:style-name="gr18" svg:width="0.565cm" svg:height="0.495cm" svg:x="2.873cm" svg:y="0.3cm"><draw:text-box><text:p>40</text:p></draw:text-box></draw:frame><draw:frame text:anchor-type="paragraph" draw:z-index="129" draw:style-name="gr3" svg:width="0.742cm" svg:height="0.548cm" svg:x="5.907cm" svg:y="0.265cm"><draw:text-box><text:p>12</text:p></draw:text-box></draw:frame></text:p>
      <text:p text:style-name="P4"><draw:frame text:anchor-type="paragraph" draw:z-index="131" draw:style-name="gr14" draw:text-style-name="P13" svg:width="2.823cm" svg:height="0.671cm" svg:x="7.177cm" svg:y="0.06cm"><draw:text-box><text:p><text:span text:style-name="T3">R W X P H</text:span></text:p></draw:text-box></draw:frame></text:p>
      <text:p text:style-name="P4"/>
      <text:p text:style-name="P4"><draw:frame text:anchor-type="paragraph" draw:z-index="134" draw:style-name="gr24" svg:width="1.306cm" svg:height="0.512cm" svg:x="3.685cm" svg:y="0.259cm"><draw:text-box><text:p>Base</text:p></draw:text-box></draw:frame><draw:frame text:anchor-type="paragraph" draw:z-index="135" draw:style-name="gr4" svg:width="1.077cm" svg:height="0.489cm" svg:x="6.489cm" svg:y="0.282cm"><draw:text-box><text:p>Flags</text:p></draw:text-box></draw:frame><draw:frame text:anchor-type="paragraph" draw:z-index="137" draw:style-name="gr27" svg:width="2.541cm" svg:height="0.976cm" svg:x="9.982cm" svg:y="0.321cm"><draw:text-box><text:p>PEntry</text:p><text:p/></draw:text-box></draw:frame></text:p>
      <text:p text:style-name="P4"><draw:line text:anchor-type="paragraph" draw:z-index="132" draw:style-name="gr11" draw:text-style-name="P10" svg:x1="1.639cm" svg:y1="0.072cm" svg:x2="7.83cm" svg:y2="0.072cm"><text:p/></draw:line><draw:line text:anchor-type="paragraph" draw:z-index="133" draw:style-name="gr16" draw:text-style-name="P10" svg:x1="6.348cm" svg:y1="-0.025cm" svg:x2="6.348cm" svg:y2="0.204cm"><text:p/></draw:line><draw:frame text:anchor-type="paragraph" draw:z-index="136" draw:style-name="gr28" svg:width="0.83cm" svg:height="0.636cm" svg:x="3.702cm" svg:y="0.24cm"><draw:text-box><text:p>52</text:p></draw:text-box></draw:frame><draw:frame text:anchor-type="paragraph" draw:z-index="138" draw:style-name="gr29" draw:text-style-name="P13" svg:width="2.541cm" svg:height="0.795cm" svg:x="6.048cm" svg:y="0.434cm"><draw:text-box><text:p><text:span text:style-name="T3">R W X P</text:span></text:p></draw:text-box></draw:frame></text:p>
      <text:p text:style-name="P4"/>
      <text:p text:style-name="P4"/>
      <text:p text:style-name="P4"/>
      <text:p text:style-name="P4"/>
      <text:p text:style-name="P4"/>
      <text:h text:style-name="P7" text:outline-level="2"><text:soft-page-break/>Locks</text:h>
      <text:p text:style-name="P1">lock address <text:s text:c="7"/>intr disable</text:p>
      <text:p text:style-name="P1">… &lt;= 64 commands</text:p>
      <text:p text:style-name="P1">unlock address <text:s text:c="5"/>intr restore </text:p>
      <text:p text:style-name="P1"/>
      <text:p text:style-name="P1">address → 64 bit, 0 OR core number</text:p>
      <text:p text:style-name="Text_20_body"/>
      <text:p text:style-name="P1">sysentry <text:s text:c="11"/>intr disable</text:p>
      <text:p text:style-name="P1"/>
      <text:p text:style-name="P1">sysexit <text:s text:c="12"/>intr enable</text:p>
      <text:p text:style-name="Text_20_body"/>
      <text:p text:style-name="Text_20_body"><draw:rect text:anchor-type="paragraph" draw:z-index="143" draw:style-name="gr7" draw:text-style-name="P10" svg:width="4.093cm" svg:height="1.8cm" svg:x="0.069cm" svg:y="0.007cm"><text:p text:style-name="P10">Core</text:p></draw:rect><draw:rect text:anchor-type="paragraph" draw:z-index="144" draw:style-name="gr7" draw:text-style-name="P10" svg:width="4.499cm" svg:height="1.765cm" svg:x="5.449cm" svg:y="0.078cm"><text:p text:style-name="P10">I mask</text:p></draw:rect><draw:frame text:anchor-type="paragraph" draw:z-index="146" draw:style-name="gr3" svg:width="1.024cm" svg:height="0.548cm" svg:x="4.426cm" svg:y="0.307cm"><draw:text-box><text:p>intr</text:p></draw:text-box></draw:frame><draw:frame text:anchor-type="paragraph" draw:z-index="148" draw:style-name="gr12" svg:width="1.729cm" svg:height="0.565cm" svg:x="10.952cm" svg:y="0.43cm"><draw:text-box><text:p>ext intr</text:p></draw:text-box></draw:frame></text:p>
      <text:p text:style-name="Text_20_body"><draw:line text:anchor-type="paragraph" draw:z-index="145" draw:style-name="gr30" draw:text-style-name="P10" svg:x1="5.449cm" svg:y1="0.349cm" svg:x2="4.161cm" svg:y2="0.367cm"><text:p/></draw:line><draw:line text:anchor-type="paragraph" draw:z-index="147" draw:style-name="gr31" draw:text-style-name="P10" svg:x1="9.947cm" svg:y1="0.296cm" svg:x2="13.316cm" svg:y2="0.296cm"><text:p/></draw:line></text:p>
      <text:p text:style-name="Text_20_body"><draw:line text:anchor-type="paragraph" draw:z-index="150" draw:style-name="gr10" draw:text-style-name="P10" svg:x1="7.654cm" svg:y1="0.445cm" svg:x2="7.654cm" svg:y2="2.121cm"><text:p/></draw:line></text:p>
      <text:p text:style-name="Text_20_body"/>
      <text:p text:style-name="Text_20_body"/>
      <text:p text:style-name="Text_20_body"><draw:rect text:anchor-type="paragraph" draw:z-index="149" draw:style-name="gr7" draw:text-style-name="P10" svg:width="4.393cm" svg:height="1.359cm" svg:x="5.502cm" svg:y="0.025cm"><text:p text:style-name="P10">backup</text:p></draw:rect></text:p>
      <text:p text:style-name="Text_20_body"/>
      <text:p text:style-name="Text_20_body"/>
      <text:p text:style-name="P1">I mask == 0 in user mode, unless lock active</text:p>
      <text:p text:style-name="P1"/>
      <text:h text:style-name="P7" text:outline-level="2">System registers</text:h>
      <text:p text:style-name="P1">VMT <text:s text:c="4"/>64 bit <text:s text:c="9"/>VMT address</text:p>
      <text:p text:style-name="P1">sysVMT <text:s/>64 bit <text:s text:c="9"/>system VMT address</text:p>
      <text:p text:style-name="P1"/>
      <text:p text:style-name="P1">sysPC <text:s text:c="2"/>64 bit <text:s text:c="9"/>PC in system mode</text:p>
      <text:p text:style-name="P1">sysSP <text:s text:c="2"/>64 bit <text:s text:c="9"/>SP in system mode</text:p>
      <text:p text:style-name="P1">intPC <text:s text:c="2"/>64 bit <text:s text:c="9"/>PC in interrupt mode</text:p>
      <text:p text:style-name="P1">intSP <text:s text:c="2"/>64 bit <text:s text:c="9"/>SP in interrupt mode</text:p>
      <text:p text:style-name="P1"/>
      <text:p text:style-name="P1">Hidden mode bits</text:p>
      <text:p text:style-name="P1"><text:soft-page-break/></text:p>
      <text:p text:style-name="P1">I <text:s text:c="7"/>1 bit <text:s text:c="9"/>interrupt mode</text:p>
      <text:p text:style-name="P1">S <text:s text:c="7"/>1 bit <text:s text:c="9"/>system mode</text:p>
      <text:p text:style-name="P1">M <text:s text:c="7"/>1 bit <text:s text:c="9"/>RAM enable <text:s/></text:p>
      <text:p text:style-name="P4"/>
      <text:h text:style-name="P7" text:outline-level="2">Backup</text:h>
      <text:p text:style-name="P1">PC, SP, R0, R1, R2, R3, FLAGS, CLK,</text:p>
      <text:p text:style-name="P4"/>
      <text:h text:style-name="P7" text:outline-level="2">Dual-VM</text:h>
      <text:p text:style-name="P4"><draw:line text:anchor-type="paragraph" draw:z-index="76" draw:style-name="gr11" draw:text-style-name="P10" svg:x1="0.122cm" svg:y1="0.455cm" svg:x2="12.875cm" svg:y2="0.455cm"><text:p/></draw:line><draw:line text:anchor-type="paragraph" draw:z-index="77" draw:style-name="gr16" draw:text-style-name="P10" svg:x1="4.805cm" svg:y1="0.279cm" svg:x2="4.805cm" svg:y2="0.72cm"><text:p/></draw:line><draw:line text:anchor-type="paragraph" draw:z-index="78" draw:style-name="gr16" draw:text-style-name="P10" svg:x1="7.768cm" svg:y1="0.772cm" svg:x2="7.768cm" svg:y2="0.243cm"><text:p/></draw:line><draw:line text:anchor-type="paragraph" draw:z-index="79" draw:style-name="gr16" draw:text-style-name="P10" svg:x1="11.52cm" svg:y1="0.737cm" svg:x2="11.52cm" svg:y2="0.243cm"><text:p/></draw:line><draw:frame text:anchor-type="paragraph" draw:z-index="80" draw:style-name="gr17" svg:width="1.235cm" svg:height="0.53cm" svg:x="1.797cm" svg:y="-0.18cm"><draw:text-box><text:p>huge</text:p></draw:text-box></draw:frame><draw:frame text:anchor-type="paragraph" draw:z-index="81" draw:style-name="gr17" svg:width="1.183cm" svg:height="0.53cm" svg:x="9.047cm" svg:y="-0.074cm"><draw:text-box><text:p>huge</text:p></draw:text-box></draw:frame></text:p>
      <text:p text:style-name="P4"><draw:frame text:anchor-type="paragraph" draw:z-index="83" draw:style-name="gr2" svg:width="2.153cm" svg:height="0.6cm" svg:x="8.535cm" svg:y="-0.138cm"><draw:text-box><text:p>sys region</text:p></draw:text-box></draw:frame><draw:frame text:anchor-type="paragraph" draw:z-index="82" draw:style-name="gr2" svg:width="2.126cm" svg:height="0.6cm" svg:x="1.471cm" svg:y="-0.102cm"><draw:text-box><text:p>user region</text:p></draw:text-box></draw:frame></text:p>
      <text:p text:style-name="P6"><draw:frame text:anchor-type="paragraph" draw:z-index="84" draw:style-name="gr18" svg:width="1.641cm" svg:height="0.495cm" svg:x="8.853cm" svg:y="0.028cm"><draw:text-box><text:p>sysVMT</text:p></draw:text-box></draw:frame><draw:frame text:anchor-type="paragraph" draw:z-index="85" draw:style-name="gr14" svg:width="1.253cm" svg:height="0.671cm" svg:x="1.85cm" svg:y="0.011cm"><draw:text-box><text:p>VMT</text:p></draw:text-box></draw:frame></text:p>
      <text:p text:style-name="P6"/>
      <text:h text:style-name="P7" text:outline-level="2">L1 as memory</text:h>
      <text:p text:style-name="P4"><draw:rect text:anchor-type="paragraph" draw:z-index="86" draw:style-name="gr7" draw:text-style-name="P10" svg:width="2.788cm" svg:height="2.488cm" svg:x="0.863cm" svg:y="0.409cm"><text:p text:style-name="P10">L1</text:p></draw:rect><draw:rect text:anchor-type="paragraph" draw:z-index="87" draw:style-name="gr7" draw:text-style-name="P10" svg:width="2.647cm" svg:height="2.435cm" svg:x="5.749cm" svg:y="0.409cm"><text:p text:style-name="P10">MPX</text:p></draw:rect><draw:frame text:anchor-type="paragraph" draw:z-index="89" draw:style-name="gr5" svg:width="1.571cm" svg:height="0.689cm" svg:x="3.896cm" svg:y="0.674cm"><draw:text-box><text:p>M = 1</text:p></draw:text-box></draw:frame></text:p>
      <text:p text:style-name="P4"><draw:line text:anchor-type="paragraph" draw:z-index="88" draw:style-name="gr25" draw:text-style-name="P10" svg:x1="3.649cm" svg:y1="0.575cm" svg:x2="5.748cm" svg:y2="0.575cm"><text:p/></draw:line></text:p>
      <text:p text:style-name="P4"/>
      <text:p text:style-name="P4"><draw:line text:anchor-type="paragraph" draw:z-index="90" draw:style-name="gr25" draw:text-style-name="P10" svg:x1="3.649cm" svg:y1="0.219cm" svg:x2="4.866cm" svg:y2="1.665cm"><text:p/></draw:line><draw:frame text:anchor-type="paragraph" draw:z-index="92" draw:style-name="gr23" svg:width="1.218cm" svg:height="0.618cm" svg:x="4.161cm" svg:y="0.219cm"><draw:text-box><text:p>M = 0</text:p></draw:text-box></draw:frame></text:p>
      <text:p text:style-name="P4"/>
      <text:p text:style-name="P4"><draw:rect text:anchor-type="paragraph" draw:z-index="91" draw:style-name="gr7" draw:text-style-name="P10" svg:width="3.158cm" svg:height="1.43cm" svg:x="3.649cm" svg:y="0.356cm"><text:p text:style-name="P10">Dummy</text:p></draw:rect></text:p>
      <text:p text:style-name="P4"/>
      <text:p text:style-name="P4"/>
      <text:p text:style-name="P1">Dummy: W – ignore R – 0</text:p>
      <text:p text:style-name="P6"/>
      <text:h text:style-name="P7" text:outline-level="2">MPX</text:h>
      <text:p text:style-name="P4"><draw:rect text:anchor-type="paragraph" draw:z-index="93" draw:style-name="gr7" draw:text-style-name="P10" svg:width="4.181cm" svg:height="4.41cm" svg:x="1.498cm" svg:y="0.427cm"><text:p text:style-name="P10">MPX</text:p></draw:rect><draw:rect text:anchor-type="paragraph" draw:z-index="94" draw:style-name="gr7" draw:text-style-name="P10" svg:width="4.093cm" svg:height="4.463cm" svg:x="7.671cm" svg:y="0.462cm"><text:p text:style-name="P10">Mem: banking</text:p></draw:rect></text:p>
      <text:p text:style-name="P4"><draw:line text:anchor-type="paragraph" draw:z-index="95" draw:style-name="gr25" draw:text-style-name="P10" svg:x1="5.678cm" svg:y1="0.681cm" svg:x2="7.671cm" svg:y2="0.681cm"><text:p/></draw:line><draw:rect text:anchor-type="paragraph" draw:z-index="98" draw:style-name="gr16" draw:text-style-name="P10" svg:width="1.465cm" svg:height="0.953cm" svg:x="12.328cm" svg:y="-0.095cm"><text:p/></draw:rect></text:p>
      <text:h text:style-name="P7" text:outline-level="2"><draw:rect text:anchor-type="paragraph" draw:z-index="99" draw:style-name="gr16" draw:text-style-name="P10" svg:width="1.447cm" svg:height="0.953cm" svg:x="12.345cm" svg:y="0.406cm"><text:p/></draw:rect></text:h>
      <text:p text:style-name="P5"><draw:line text:anchor-type="paragraph" draw:z-index="96" draw:style-name="gr25" draw:text-style-name="P10" svg:x1="5.678cm" svg:y1="0.076cm" svg:x2="7.672cm" svg:y2="0.076cm"><text:p/></draw:line></text:p>
      <text:p text:style-name="P5"><draw:line text:anchor-type="paragraph" draw:z-index="97" draw:style-name="gr25" draw:text-style-name="P10" svg:x1="5.678cm" svg:y1="0.577cm" svg:x2="7.583cm" svg:y2="0.577cm"><text:p/></draw:line><draw:rect text:anchor-type="paragraph" draw:z-index="100" draw:style-name="gr16" draw:text-style-name="P10" svg:width="1.465cm" svg:height="0.883cm" svg:x="12.328cm" svg:y="-0.314cm"><text:p/></draw:rect></text:p>
      <text:p text:style-name="P5"><draw:rect text:anchor-type="paragraph" draw:z-index="101" draw:style-name="gr16" draw:text-style-name="P10" svg:width="1.482cm" svg:height="0.847cm" svg:x="12.345cm" svg:y="0.064cm"><text:p/></draw:rect></text:p>
      <text:h text:style-name="P7" text:outline-level="2"><text:soft-page-break/></text:h>
      <text:h text:style-name="P7" text:outline-level="2">Intr controller</text:h>
      <text:p text:style-name="P4"/>
      <text:p text:style-name="P4"/>
      <text:h text:style-name="P7" text:outline-level="2">Timers</text:h>
      <text:p text:style-name="P4"/>
      <text:p text:style-name="P4"/>
      <text:h text:style-name="P7" text:outline-level="2">Text display</text:h>
      <text:p text:style-name="P4"/>
      <text:p text:style-name="P4"/>
      <text:h text:style-name="P7" text:outline-level="2">Keyboard</text:h>
      <text:p text:style-name="P4"/>
      <text:p text:style-name="P4"/>
      <text:h text:style-name="P7" text:outline-level="2">Disk</text:h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nonymous Pro1" svg:font-family="'Anonymous Pro'" style:font-family-generic="modern" style:font-pitch="fixed"/>
    <style:font-face style:name="Anonymous Pro" svg:font-family="'Anonymous Pro'" style:font-adornments="Regular" style:font-family-generic="modern" style:font-pitch="fixed"/>
    <style:font-face style:name="Anonymous Pro2" svg:font-family="'Anonymous Pr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class="text">
      <style:paragraph-properties fo:background-color="#e6e6ff">
        <style:background-image/>
      </style:paragraph-properties>
      <style:text-properties style:font-name="Anonymous Pro" fo:font-size="14pt"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rgey Strukov</meta:initial-creator>
    <meta:creation-date>2026-05-28T15:43:18.59</meta:creation-date>
    <meta:generator>OpenOffice/4.1.16$Win32 OpenOffice.org_project/4116m3$Build-9816</meta:generator>
    <dc:date>2026-06-01T14:24:27.12</dc:date>
    <dc:creator>Sergey Strukov</dc:creator>
    <meta:editing-duration>PT5H58M44S</meta:editing-duration>
    <meta:editing-cycles>165</meta:editing-cycles>
    <meta:document-statistic meta:table-count="0" meta:image-count="0" meta:object-count="0" meta:page-count="7" meta:paragraph-count="84" meta:word-count="306" meta:character-count="1808"/>
  </office:meta>
</office:document-meta>
</file>