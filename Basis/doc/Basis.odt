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nonymous Pro" svg:font-family="'Anonymous Pro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">
      <style:text-properties fo:language="en" fo:country="US"/>
    </style:style>
    <style:style style:name="P2" style:family="paragraph" style:parent-style-name="Code">
      <style:text-properties fo:language="en" fo:country="US" style:text-underline-style="non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start" style:justify-single-word="false"/>
      <style:text-properties fo:language="en" fo:country="US" style:text-underline-style="none"/>
    </style:style>
    <style:style style:name="P5" style:family="paragraph" style:parent-style-name="Text_20_body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P6" style:family="paragraph" style:parent-style-name="Heading_20_2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P7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Text_20_body">
      <style:paragraph-properties fo:text-align="start" style:justify-single-word="false"/>
      <style:text-properties fo:language="en" fo:country="US" style:text-underline-style="none"/>
    </style:style>
    <style:style style:name="P10" style:family="paragraph">
      <style:paragraph-properties fo:text-align="center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ru" fo:country="RU"/>
    </style:style>
    <style:style style:name="T2" style:family="text">
      <style:text-properties fo:font-size="12pt"/>
    </style:style>
    <style:style style:name="gr1" style:family="graphic">
      <style:graphic-properties svg:stroke-color="#3333ff" draw:marker-start="Dimension_20_Lines" draw:marker-end="Dimension_20_Lines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3333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Arrow"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Arrow" draw:marker-end="Arrow"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Arrow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start="Dimension_20_Lines" draw:marker-end="Dimension_20_Lines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7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marker-start="Dimension_20_Lines" draw:marker-end="Dimension_20_Lines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Basis</text:h>
      <text:h text:style-name="P6" text:outline-level="2">Data types</text:h>
      <text:p text:style-name="P4"><draw:line text:anchor-type="paragraph" draw:z-index="0" draw:style-name="gr1" draw:text-style-name="P10" svg:x1="0.351cm" svg:y1="0.45cm" svg:x2="1.351cm" svg:y2="0.45cm"><text:p/></draw:line></text:p>
      <text:p text:style-name="P4"><draw:line text:anchor-type="paragraph" draw:z-index="1" draw:style-name="gr1" draw:text-style-name="P10" svg:x1="0.351cm" svg:y1="0.483cm" svg:x2="2.351cm" svg:y2="0.483cm"><text:p/></draw:line></text:p>
      <text:p text:style-name="P4"/>
      <text:p text:style-name="P4"><draw:line text:anchor-type="paragraph" draw:z-index="2" draw:style-name="gr1" draw:text-style-name="P10" svg:x1="0.369cm" svg:y1="-0.152cm" svg:x2="4.37cm" svg:y2="-0.152cm"><text:p/></draw:line></text:p>
      <text:p text:style-name="P4"><draw:line text:anchor-type="paragraph" draw:z-index="3" draw:style-name="gr1" draw:text-style-name="P10" svg:x1="0.367cm" svg:y1="-0.152cm" svg:x2="8.366cm" svg:y2="-0.152cm"><text:p/></draw:line></text:p>
      <text:p text:style-name="P1">sint8 <text:s/>uint8 <text:s/>= byte</text:p>
      <text:p text:style-name="P1">sint16 uint16 </text:p>
      <text:p text:style-name="P1">sint32 uint32 = <text:s/>int uint</text:p>
      <text:p text:style-name="P1">sint64 uint64 = slen ulen</text:p>
      <text:h text:style-name="P6" text:outline-level="2">Registers</text:h>
      <text:p text:style-name="P5"><draw:line text:anchor-type="paragraph" draw:z-index="4" draw:style-name="gr1" draw:text-style-name="P10" svg:x1="0.367cm" svg:y1="0.388cm" svg:x2="8.366cm" svg:y2="0.388cm"><text:p/></draw:line></text:p>
      <text:p text:style-name="P5"><draw:line text:anchor-type="paragraph" draw:z-index="5" draw:style-name="gr1" draw:text-style-name="P10" svg:x1="0.369cm" svg:y1="0.264cm" svg:x2="4.37cm" svg:y2="0.264cm"><text:p/></draw:line><draw:line text:anchor-type="paragraph" draw:z-index="6" draw:style-name="gr1" draw:text-style-name="P10" svg:x1="4.369cm" svg:y1="0.264cm" svg:x2="8.37cm" svg:y2="0.264cm"><text:p/></draw:line></text:p>
      <text:p text:style-name="P5"><draw:line text:anchor-type="paragraph" draw:z-index="7" draw:style-name="gr1" draw:text-style-name="P10" svg:x1="0.369cm" svg:y1="0.201cm" svg:x2="2.369cm" svg:y2="0.201cm"><text:p/></draw:line><draw:line text:anchor-type="paragraph" draw:z-index="8" draw:style-name="gr1" draw:text-style-name="P10" svg:x1="2.369cm" svg:y1="0.201cm" svg:x2="4.369cm" svg:y2="0.201cm"><text:p/></draw:line><draw:line text:anchor-type="paragraph" draw:z-index="9" draw:style-name="gr1" draw:text-style-name="P10" svg:x1="4.369cm" svg:y1="0.201cm" svg:x2="6.369cm" svg:y2="0.201cm"><text:p/></draw:line><draw:line text:anchor-type="paragraph" draw:z-index="10" draw:style-name="gr1" draw:text-style-name="P10" svg:x1="6.369cm" svg:y1="0.201cm" svg:x2="8.369cm" svg:y2="0.201cm"><text:p/></draw:line></text:p>
      <text:p text:style-name="P5"><draw:line text:anchor-type="paragraph" draw:z-index="19" draw:style-name="gr1" draw:text-style-name="P10" svg:x1="0.386cm" svg:y1="0.185cm" svg:x2="1.386cm" svg:y2="0.185cm"><text:p/></draw:line><draw:line text:anchor-type="paragraph" draw:z-index="20" draw:style-name="gr1" draw:text-style-name="P10" svg:x1="1.386cm" svg:y1="0.185cm" svg:x2="2.386cm" svg:y2="0.185cm"><text:p/></draw:line><draw:line text:anchor-type="paragraph" draw:z-index="21" draw:style-name="gr1" draw:text-style-name="P10" svg:x1="2.387cm" svg:y1="0.185cm" svg:x2="3.387cm" svg:y2="0.185cm"><text:p/></draw:line><draw:line text:anchor-type="paragraph" draw:z-index="22" draw:style-name="gr1" draw:text-style-name="P10" svg:x1="3.297cm" svg:y1="0.185cm" svg:x2="4.297cm" svg:y2="0.185cm"><text:p/></draw:line><draw:line text:anchor-type="paragraph" draw:z-index="23" draw:style-name="gr1" draw:text-style-name="P10" svg:x1="4.297cm" svg:y1="0.185cm" svg:x2="5.297cm" svg:y2="0.185cm"><text:p/></draw:line><draw:line text:anchor-type="paragraph" draw:z-index="24" draw:style-name="gr1" draw:text-style-name="P10" svg:x1="5.297cm" svg:y1="0.185cm" svg:x2="6.297cm" svg:y2="0.185cm"><text:p/></draw:line><draw:line text:anchor-type="paragraph" draw:z-index="25" draw:style-name="gr1" draw:text-style-name="P10" svg:x1="6.297cm" svg:y1="0.185cm" svg:x2="7.297cm" svg:y2="0.185cm"><text:p/></draw:line><draw:line text:anchor-type="paragraph" draw:z-index="26" draw:style-name="gr1" draw:text-style-name="P10" svg:x1="7.297cm" svg:y1="0.185cm" svg:x2="8.297cm" svg:y2="0.185cm"><text:p/></draw:line></text:p>
      <text:p text:style-name="P2">R0 – R15 <text:s/>64 bit</text:p>
      <text:p text:style-name="P2"/>
      <text:p text:style-name="P2">R0</text:p>
      <text:p text:style-name="P2">R0.32.0-1</text:p>
      <text:p text:style-name="P2">R0.16.0-3</text:p>
      <text:p text:style-name="P2">R0.8.0-7</text:p>
      <text:p text:style-name="P3"/>
      <text:h text:style-name="P7" text:outline-level="2">Special registers</text:h>
      <text:p text:style-name="P1">PC <text:s text:c="2"/>64 bit <text:s text:c="8"/>processor counter</text:p>
      <text:p text:style-name="P1">LR <text:s text:c="2"/>64 bit <text:s text:c="8"/>link register</text:p>
      <text:p text:style-name="P1">SP <text:s text:c="2"/>64 bit <text:s text:c="8"/>stack pointer</text:p>
      <text:p text:style-name="P1">BP <text:s text:c="2"/>64 bit <text:s text:c="8"/>base pointer</text:p>
      <text:p text:style-name="P1">OP <text:s text:c="2"/>64 bit <text:s text:c="8"/>object pointer</text:p>
      <text:p text:style-name="P1">CTX <text:s/>64 bit <text:s text:c="8"/>context</text:p>
      <text:p text:style-name="P1"><text:soft-page-break/>TBP <text:s/>(ro) <text:s/>64 bit <text:s text:c="2"/>thread base pointer</text:p>
      <text:p text:style-name="P1">CLK <text:s/>(ro) <text:s text:c="10"/>CPU clock counter</text:p>
      <text:p text:style-name="P1"/>
      <text:p text:style-name="P1">F <text:s text:c="6"/>4 bit <text:s/>O C N Z</text:p>
      <text:p text:style-name="P1">FLAGS <text:s/>64 bit <text:s/>F.0-15</text:p>
      <text:p text:style-name="P1"><text:s text:c="7"/>F.0-7 <text:s text:c="2"/>immediate</text:p>
      <text:p text:style-name="P1"><text:s text:c="7"/>F.8-15 <text:s/>sticky</text:p>
      <text:p text:style-name="P1"><text:s text:c="7"/>F.0.C <text:s text:c="2"/>bit C in<text:span text:style-name="T1"> </text:span>flag block<text:span text:style-name="T1"> </text:span>0 <text:tab/></text:p>
      <text:p text:style-name="Text_20_body"/>
      <text:p text:style-name="Text_20_body"><draw:line text:anchor-type="paragraph" draw:z-index="11" draw:style-name="gr1" draw:text-style-name="P10" svg:x1="0.457cm" svg:y1="0.067cm" svg:x2="5.29cm" svg:y2="0.067cm"><text:p/></draw:line><draw:frame text:anchor-type="paragraph" draw:z-index="12" draw:style-name="gr2" svg:width="0.512cm" svg:height="0.6cm" svg:x="0.933cm" svg:y="0.208cm"><draw:text-box><text:p>O</text:p></draw:text-box></draw:frame><draw:frame text:anchor-type="paragraph" draw:z-index="13" draw:style-name="gr3" svg:width="0.565cm" svg:height="0.548cm" svg:x="2.08cm" svg:y="0.226cm"><draw:text-box><text:p>C</text:p></draw:text-box></draw:frame><draw:frame text:anchor-type="paragraph" draw:z-index="15" draw:style-name="gr5" svg:width="0.459cm" svg:height="0.689cm" svg:x="4.531cm" svg:y="0.261cm"><draw:text-box><text:p>Z</text:p></draw:text-box></draw:frame><draw:frame text:anchor-type="paragraph" draw:z-index="14" draw:style-name="gr4" draw:text-style-name="P11" svg:width="0.551cm" svg:height="0.489cm" svg:x="3.314cm" svg:y="0.243cm"><draw:text-box><text:p><text:span text:style-name="T2">N</text:span></text:p></draw:text-box></draw:frame><draw:line text:anchor-type="paragraph" draw:z-index="16" draw:style-name="gr6" draw:text-style-name="P10" svg:x1="1.63cm" svg:y1="0.208cm" svg:x2="1.63cm" svg:y2="-0.057cm"><text:p/></draw:line></text:p>
      <text:p text:style-name="P3"><draw:line text:anchor-type="paragraph" draw:z-index="18" draw:style-name="gr6" draw:text-style-name="P10" svg:x1="4.119cm" svg:y1="-0.51cm" svg:x2="4.119cm" svg:y2="-0.775cm"><text:p/></draw:line><draw:line text:anchor-type="paragraph" draw:z-index="17" draw:style-name="gr6" draw:text-style-name="P10" svg:x1="2.917cm" svg:y1="-0.497cm" svg:x2="2.917cm" svg:y2="-0.762cm"><text:p/></draw:line></text:p>
      <text:h text:style-name="P6" text:outline-level="2">Ordinary commands</text:h>
      <text:p text:style-name="P3"/>
      <text:p text:style-name="P1">Rdst = Csrc</text:p>
      <text:p text:style-name="P1">Rdst = unop RCsrc</text:p>
      <text:p text:style-name="P1">Rdst = RCsrc1 binop RCsrc2</text:p>
      <text:p text:style-name="P1"/>
      <text:p text:style-name="P1">[Cond] Rdst = RCsrc1 binop RCsrc2</text:p>
      <text:p text:style-name="P1">Rdst,F.0 = RCsrc1 binop RCsrc2</text:p>
      <text:p text:style-name="P3"/>
      <text:p text:style-name="P1">jmp RCsrc</text:p>
      <text:p text:style-name="P1">jmp PC+Csrc</text:p>
      <text:p text:style-name="P1"/>
      <text:p text:style-name="P1">call RCsrc</text:p>
      <text:p text:style-name="P1">call PC+Csrc</text:p>
      <text:p text:style-name="P1"/>
      <text:p text:style-name="P1">ret</text:p>
      <text:p text:style-name="P3"/>
      <text:p text:style-name="P1">Dst <text:s/>= RCsrc</text:p>
      <text:p text:style-name="P1">Rdst = Src</text:p>
      <text:p text:style-name="P1"/>
      <text:p text:style-name="P1"><text:soft-page-break/>Dst = *Src</text:p>
      <text:p text:style-name="P1">Dst = *(Src+RCsrc)</text:p>
      <text:p text:style-name="P1">Dst = *(Src+Csrc*Rsrc)</text:p>
      <text:p text:style-name="P1">Dst = *(Src+Csrc*Rsrc+Csrc)</text:p>
      <text:p text:style-name="P1"/>
      <text:p text:style-name="P1">*Dst <text:s text:c="18"/>= Src</text:p>
      <text:p text:style-name="P1">*(Dst+RCdst) <text:s text:c="10"/>= Src</text:p>
      <text:p text:style-name="P1">*(Dst+Cdst*RCdst) <text:s text:c="5"/>= Src</text:p>
      <text:p text:style-name="P1">*(Dst+Cdst*Rdst+Cdst) <text:s/>= Src</text:p>
      <text:p text:style-name="Text_20_body"/>
      <text:h text:style-name="P6" text:outline-level="2">Memory</text:h>
      <text:p text:style-name="Text_20_body"><draw:rect text:anchor-type="paragraph" draw:z-index="27" draw:style-name="gr7" draw:text-style-name="P10" svg:width="3.864cm" svg:height="4.64cm" svg:x="0.492cm" svg:y="0.37cm"><text:p text:style-name="P10">Core</text:p></draw:rect><draw:rect text:anchor-type="paragraph" draw:z-index="28" draw:style-name="gr7" draw:text-style-name="P10" svg:width="3.846cm" svg:height="4.64cm" svg:x="6.419cm" svg:y="0.37cm"><text:p text:style-name="P10">VM</text:p></draw:rect><draw:rect text:anchor-type="paragraph" draw:z-index="29" draw:style-name="gr7" draw:text-style-name="P10" svg:width="4.269cm" svg:height="4.675cm" svg:x="12.293cm" svg:y="0.37cm"><text:p text:style-name="P10">L1</text:p></draw:rect></text:p>
      <text:p text:style-name="Text_20_body"><draw:line text:anchor-type="paragraph" draw:z-index="30" draw:style-name="gr8" draw:text-style-name="P12" svg:x1="4.355cm" svg:y1="0.642cm" svg:x2="6.419cm" svg:y2="0.642cm"><text:p text:style-name="P12">S</text:p></draw:line></text:p>
      <text:p text:style-name="Text_20_body"><draw:line text:anchor-type="paragraph" draw:z-index="33" draw:style-name="gr8" draw:text-style-name="P12" svg:x1="10.264cm" svg:y1="-0.046cm" svg:x2="12.328cm" svg:y2="-0.046cm"><text:p text:style-name="P12">S</text:p></draw:line></text:p>
      <text:p text:style-name="Text_20_body"><draw:line text:anchor-type="paragraph" draw:z-index="31" draw:style-name="gr8" draw:text-style-name="P10" svg:x1="4.355cm" svg:y1="0.647cm" svg:x2="6.419cm" svg:y2="0.647cm"><text:p text:style-name="P12">VA</text:p></draw:line></text:p>
      <text:p text:style-name="Text_20_body"><draw:line text:anchor-type="paragraph" draw:z-index="34" draw:style-name="gr8" draw:text-style-name="P10" svg:x1="10.264cm" svg:y1="-0.005cm" svg:x2="12.328cm" svg:y2="-0.005cm"><text:p text:style-name="P12">PA</text:p></draw:line></text:p>
      <text:p text:style-name="Text_20_body"/>
      <text:p text:style-name="Text_20_body"><draw:line text:anchor-type="paragraph" draw:z-index="32" draw:style-name="gr9" draw:text-style-name="P10" svg:x1="4.355cm" svg:y1="0.131cm" svg:x2="6.419cm" svg:y2="0.131cm"><text:p text:style-name="P12">D</text:p></draw:line><draw:line text:anchor-type="paragraph" draw:z-index="35" draw:style-name="gr9" draw:text-style-name="P10" svg:x1="10.229cm" svg:y1="0.095cm" svg:x2="12.293cm" svg:y2="0.095cm"><text:p text:style-name="P12">D</text:p></draw:line></text:p>
      <text:p text:style-name="Text_20_body"/>
      <text:p text:style-name="P1">S = Code Data ROData</text:p>
      <text:p text:style-name="Text_20_body"><draw:rect text:anchor-type="paragraph" draw:z-index="36" draw:style-name="gr7" draw:text-style-name="P10" svg:width="3.846cm" svg:height="2.1cm" svg:x="0.422cm" svg:y="0.684cm"><text:p text:style-name="P10">L1</text:p></draw:rect></text:p>
      <text:p text:style-name="Text_20_body"><draw:rect text:anchor-type="paragraph" draw:z-index="40" draw:style-name="gr7" draw:text-style-name="P10" svg:width="4.463cm" svg:height="7.233cm" svg:x="12.01cm" svg:y="0.004cm"><text:p text:style-name="P10">Mem</text:p></draw:rect></text:p>
      <text:p text:style-name="Text_20_body"><draw:line text:anchor-type="paragraph" draw:z-index="43" draw:style-name="gr10" draw:text-style-name="P10" svg:x1="4.267cm" svg:y1="0.522cm" svg:x2="6.701cm" svg:y2="2.162cm"><text:p/></draw:line></text:p>
      <text:p text:style-name="Text_20_body"><draw:rect text:anchor-type="paragraph" draw:z-index="39" draw:style-name="gr7" draw:text-style-name="P10" svg:width="3.176cm" svg:height="4.093cm" svg:x="6.701cm" svg:y="0.423cm"><text:p text:style-name="P10">MPX</text:p></draw:rect></text:p>
      <text:p text:style-name="Text_20_body"><draw:rect text:anchor-type="paragraph" draw:z-index="37" draw:style-name="gr7" draw:text-style-name="P10" svg:width="3.793cm" svg:height="1.959cm" svg:x="0.474cm" svg:y="0.572cm"><text:p text:style-name="P10">L1</text:p></draw:rect></text:p>
      <text:p text:style-name="Text_20_body"/>
      <text:p text:style-name="Text_20_body"><draw:line text:anchor-type="paragraph" draw:z-index="41" draw:style-name="gr10" draw:text-style-name="P10" svg:x1="9.875cm" svg:y1="0.321cm" svg:x2="12.01cm" svg:y2="0.321cm"><text:p/></draw:line><draw:line text:anchor-type="paragraph" draw:z-index="42" draw:style-name="gr10" draw:text-style-name="P10" svg:x1="4.267cm" svg:y1="0.127cm" svg:x2="6.701cm" svg:y2="0.127cm"><text:p/></draw:line></text:p>
      <text:p text:style-name="Text_20_body"><draw:line text:anchor-type="paragraph" draw:z-index="44" draw:style-name="gr10" draw:text-style-name="P10" svg:x1="4.284cm" svg:y1="2.092cm" svg:x2="6.701cm" svg:y2="0.31cm"><text:p/></draw:line></text:p>
      <text:p text:style-name="Text_20_body"><draw:rect text:anchor-type="paragraph" draw:z-index="38" draw:style-name="gr7" draw:text-style-name="P10" svg:width="3.811cm" svg:height="2.082cm" svg:x="0.474cm" svg:y="0.335cm"><text:p text:style-name="P10">L1</text:p></draw:rect></text:p>
      <text:p text:style-name="Text_20_body"/>
      <text:p text:style-name="Text_20_body"/>
      <text:p text:style-name="Text_20_body"/>
      <text:p text:style-name="Text_20_body"/>
      <text:p text:style-name="P1"><text:soft-page-break/>Cache line = 64 byte = 8 Reg</text:p>
      <text:p text:style-name="Text_20_body"/>
      <text:h text:style-name="P6" text:outline-level="2">Address space</text:h>
      <text:p text:style-name="P4"><draw:frame text:anchor-type="paragraph" draw:z-index="55" draw:style-name="gr2" svg:width="2.029cm" svg:height="0.6cm" svg:x="1.833cm" svg:y="-0.106cm"><draw:text-box><text:p>BootROM</text:p></draw:text-box></draw:frame><draw:frame text:anchor-type="paragraph" draw:z-index="56" draw:style-name="gr17" svg:width="1.712cm" svg:height="0.53cm" svg:x="3.385cm" svg:y="0.335cm"><draw:text-box><text:p>Registers</text:p></draw:text-box></draw:frame><draw:frame text:anchor-type="paragraph" draw:z-index="57" draw:style-name="gr5" svg:width="1.394cm" svg:height="0.689cm" svg:x="7.089cm" svg:y="0.282cm"><draw:text-box><text:p>RAM</text:p></draw:text-box></draw:frame><draw:frame text:anchor-type="paragraph" draw:z-index="58" draw:style-name="gr18" svg:width="1.024cm" svg:height="0.495cm" svg:x="13.157cm" svg:y="0.318cm"><draw:text-box><text:p>Dev</text:p></draw:text-box></draw:frame></text:p>
      <text:p text:style-name="P4"><draw:line text:anchor-type="paragraph" draw:z-index="45" draw:style-name="gr11" draw:text-style-name="P10" svg:x1="0.474cm" svg:y1="0.201cm" svg:x2="16.684cm" svg:y2="0.201cm"><text:p/></draw:line><draw:frame text:anchor-type="paragraph" draw:z-index="46" draw:style-name="gr12" svg:width="0.636cm" svg:height="0.565cm" svg:x="1.039cm" svg:y="0.201cm"><draw:text-box><text:p>4M</text:p></draw:text-box></draw:frame><draw:frame text:anchor-type="paragraph" draw:z-index="47" draw:style-name="gr13" svg:width="0.724cm" svg:height="0.583cm" svg:x="2.432cm" svg:y="0.201cm"><draw:text-box><text:p>4M</text:p></draw:text-box></draw:frame><draw:frame text:anchor-type="paragraph" draw:z-index="48" draw:style-name="gr14" svg:width="0.83cm" svg:height="0.671cm" svg:x="3.808cm" svg:y="0.201cm"><draw:text-box><text:p>4M</text:p></draw:text-box></draw:frame><draw:frame text:anchor-type="paragraph" draw:z-index="49" draw:style-name="gr15" svg:width="0.812cm" svg:height="0.706cm" svg:x="7.424cm" svg:y="0.201cm"><draw:text-box><text:p>4T</text:p></draw:text-box></draw:frame><draw:frame text:anchor-type="paragraph" draw:z-index="50" draw:style-name="gr14" svg:width="0.777cm" svg:height="0.671cm" svg:x="13.51cm" svg:y="0.201cm"><draw:text-box><text:p>4T</text:p></draw:text-box></draw:frame><draw:line text:anchor-type="paragraph" draw:z-index="51" draw:style-name="gr16" draw:text-style-name="P10" svg:x1="2.027cm" svg:y1="0.042cm" svg:x2="2.027cm" svg:y2="0.412cm"><text:p/></draw:line><draw:line text:anchor-type="paragraph" draw:z-index="52" draw:style-name="gr16" draw:text-style-name="P10" svg:x1="3.526cm" svg:y1="0.007cm" svg:x2="3.526cm" svg:y2="0.395cm"><text:p/></draw:line><draw:line text:anchor-type="paragraph" draw:z-index="53" draw:style-name="gr16" draw:text-style-name="P10" svg:x1="4.955cm" svg:y1="0.007cm" svg:x2="4.955cm" svg:y2="0.377cm"><text:p/></draw:line><draw:line text:anchor-type="paragraph" draw:z-index="54" draw:style-name="gr16" draw:text-style-name="P10" svg:x1="10.811cm" svg:y1="0.007cm" svg:x2="10.829cm" svg:y2="0.43cm"><text:p/></draw:line><draw:rect text:anchor-type="paragraph" draw:z-index="59" draw:style-name="gr19" draw:text-style-name="P10" svg:width="1.518cm" svg:height="0.389cm" svg:x="0.51cm" svg:y="-0.205cm"><text:p/></draw:rect></text:p>
      <text:p text:style-name="P4"/>
      <text:h text:style-name="P6" text:outline-level="2">Process</text:h>
      <text:p text:style-name="P4"><draw:line text:anchor-type="paragraph" draw:z-index="61" draw:style-name="gr16" draw:text-style-name="P10" svg:x1="5.484cm" svg:y1="0.3cm" svg:x2="5.484cm" svg:y2="0.706cm"><text:p/></draw:line><draw:line text:anchor-type="paragraph" draw:z-index="62" draw:style-name="gr16" draw:text-style-name="P10" svg:x1="7.618cm" svg:y1="0.3cm" svg:x2="7.618cm" svg:y2="0.688cm"><text:p/></draw:line><draw:line text:anchor-type="paragraph" draw:z-index="66" draw:style-name="gr16" draw:text-style-name="P10" svg:x1="2.397cm" svg:y1="0.335cm" svg:x2="2.397cm" svg:y2="0.705cm"><text:p/></draw:line><draw:line text:anchor-type="paragraph" draw:z-index="68" draw:style-name="gr16" draw:text-style-name="P10" svg:x1="4.337cm" svg:y1="0.3cm" svg:x2="4.337cm" svg:y2="0.723cm"><text:p/></draw:line></text:p>
      <text:p text:style-name="P4"><draw:line text:anchor-type="paragraph" draw:z-index="60" draw:style-name="gr11" draw:text-style-name="P10" svg:x1="0.686cm" svg:y1="-0.188cm" svg:x2="15.891cm" svg:y2="-0.187cm"><text:p/></draw:line><draw:frame text:anchor-type="paragraph" draw:z-index="63" draw:style-name="gr20" svg:width="1.041cm" svg:height="0.724cm" svg:x="2.891cm" svg:y="-0.169cm"><draw:text-box><text:p>Stack</text:p></draw:text-box></draw:frame><draw:frame text:anchor-type="paragraph" draw:z-index="64" draw:style-name="gr13" svg:width="1.235cm" svg:height="0.583cm" svg:x="6.084cm" svg:y="-0.169cm"><draw:text-box><text:p>Code</text:p></draw:text-box></draw:frame><draw:frame text:anchor-type="paragraph" draw:z-index="65" draw:style-name="gr4" svg:width="1.077cm" svg:height="0.489cm" svg:x="11.269cm" svg:y="-0.205cm"><draw:text-box><text:p>Data</text:p></draw:text-box></draw:frame><draw:frame text:anchor-type="paragraph" draw:z-index="67" draw:style-name="gr21" svg:width="1.5cm" svg:height="0.759cm" svg:x="0.898cm" svg:y="-0.169cm"><draw:text-box><text:p>ROData</text:p></draw:text-box></draw:frame><draw:frame text:anchor-type="paragraph" draw:z-index="69" draw:style-name="gr22" svg:width="0.918cm" svg:height="0.653cm" svg:x="4.514cm" svg:y="-0.169cm"><draw:text-box><text:p>TVS</text:p></draw:text-box></draw:frame></text:p>
      <text:p text:style-name="P4"><draw:line text:anchor-type="paragraph" draw:z-index="71" draw:style-name="gr24" draw:text-style-name="P10" svg:x1="1.956cm" svg:y1="0.385cm" svg:x2="1.956cm" svg:y2="0.826cm"><text:p/></draw:line><draw:line text:anchor-type="paragraph" draw:z-index="72" draw:style-name="gr24" draw:text-style-name="P10" svg:x1="7.643cm" svg:y1="0.367cm" svg:x2="7.643cm" svg:y2="0.896cm"><text:p/></draw:line><draw:rect text:anchor-type="paragraph" draw:z-index="75" draw:style-name="gr27" draw:text-style-name="P10" svg:width="1.253cm" svg:height="0.468cm" svg:x="0.704cm" svg:y="0.12cm"><text:p/></draw:rect></text:p>
      <text:p text:style-name="P4"><draw:line text:anchor-type="paragraph" draw:z-index="70" draw:style-name="gr23" draw:text-style-name="P10" svg:x1="0.65cm" svg:y1="-0.111cm" svg:x2="9.065cm" svg:y2="-0.111cm"><text:p/></draw:line><draw:frame text:anchor-type="paragraph" draw:z-index="73" draw:style-name="gr25" svg:width="1.43cm" svg:height="0.618cm" svg:x="4.443cm" svg:y="-0.111cm"><draw:text-box><text:p>Stack</text:p></draw:text-box></draw:frame><draw:frame text:anchor-type="paragraph" draw:z-index="74" draw:style-name="gr26" svg:width="0.989cm" svg:height="0.512cm" svg:x="7.971cm" svg:y="-0.111cm"><draw:text-box><text:p>TVS</text:p></draw:text-box></draw:frame></text:p>
      <text:p text:style-name="P4"/>
      <text:p text:style-name="P1">Page aligned, page size = 4K</text:p>
      <text:p text:style-name="P4"/>
      <text:h text:style-name="P6" text:outline-level="2">VMT</text:h>
      <text:p text:style-name="P4"/>
      <text:p text:style-name="P4"/>
      <text:h text:style-name="P6" text:outline-level="2">Locks</text:h>
      <text:p text:style-name="P4"/>
      <text:p text:style-name="P4"/>
      <text:h text:style-name="P6" text:outline-level="2">System registers</text:h>
      <text:p text:style-name="P4"/>
      <text:p text:style-name="P4"/>
      <text:h text:style-name="P6" text:outline-level="2">Backup</text:h>
      <text:p text:style-name="P4"/>
      <text:p text:style-name="P4"/>
      <text:h text:style-name="P6" text:outline-level="2">Dual-VM</text:h>
      <text:p text:style-name="P4"/>
      <text:p text:style-name="P4"/>
      <text:h text:style-name="P6" text:outline-level="2"><text:soft-page-break/>L1 as memory</text:h>
      <text:p text:style-name="P4"/>
      <text:p text:style-name="P4"/>
      <text:h text:style-name="P6" text:outline-level="2">MPX</text:h>
      <text:p text:style-name="P4"/>
      <text:p text:style-name="P4"/>
      <text:h text:style-name="P6" text:outline-level="2">Intr controller</text:h>
      <text:p text:style-name="P4"/>
      <text:p text:style-name="P4"/>
      <text:h text:style-name="P6" text:outline-level="2">Timers</text:h>
      <text:p text:style-name="P4"/>
      <text:p text:style-name="P4"/>
      <text:h text:style-name="P6" text:outline-level="2">Text display</text:h>
      <text:p text:style-name="P4"/>
      <text:p text:style-name="P4"/>
      <text:h text:style-name="P6" text:outline-level="2">Keyboard</text:h>
      <text:p text:style-name="P4"/>
      <text:p text:style-name="P4"/>
      <text:h text:style-name="P6" text:outline-level="2">Disk</text:h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nonymous Pro" svg:font-family="'Anonymous Pro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class="text">
      <style:paragraph-properties fo:background-color="#e6e6ff">
        <style:background-image/>
      </style:paragraph-properties>
      <style:text-properties style:font-name="Anonymous Pro" fo:font-size="14pt"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ey Strukov</meta:initial-creator>
    <meta:creation-date>2026-05-28T15:43:18.59</meta:creation-date>
    <meta:generator>OpenOffice/4.1.16$Win32 OpenOffice.org_project/4116m3$Build-9816</meta:generator>
    <dc:date>2026-05-31T17:12:46.55</dc:date>
    <dc:creator>Sergey Strukov</dc:creator>
    <meta:editing-duration>PT3H22M59S</meta:editing-duration>
    <meta:editing-cycles>89</meta:editing-cycles>
    <meta:document-statistic meta:table-count="0" meta:image-count="0" meta:object-count="0" meta:page-count="5" meta:paragraph-count="65" meta:word-count="198" meta:character-count="1156"/>
  </office:meta>
</office:document-meta>
</file>