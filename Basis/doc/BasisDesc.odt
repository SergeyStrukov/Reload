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style:writing-mode="lr-tb" style:writing-mode-automatic="false"/>
      <style:text-properties officeooo:rsid="000dc22a" officeooo:paragraph-rsid="000dc22a"/>
    </style:style>
    <style:style style:name="P2" style:family="paragraph" style:parent-style-name="Text_20_body">
      <style:paragraph-properties style:writing-mode="lr-tb" style:writing-mode-automatic="false"/>
      <style:text-properties fo:language="en" fo:country="US" officeooo:rsid="000efca8" officeooo:paragraph-rsid="000efca8"/>
    </style:style>
    <style:style style:name="P3" style:family="paragraph" style:parent-style-name="Text_20_body">
      <style:paragraph-properties style:writing-mode="lr-tb" style:writing-mode-automatic="false"/>
      <style:text-properties fo:language="en" fo:country="US" officeooo:rsid="000fd1db" officeooo:paragraph-rsid="000fd1db"/>
    </style:style>
    <style:style style:name="P4" style:family="paragraph" style:parent-style-name="Text_20_body">
      <style:paragraph-properties style:writing-mode="lr-tb" style:writing-mode-automatic="false"/>
      <style:text-properties fo:language="ru" fo:country="RU" officeooo:rsid="00146dff" officeooo:paragraph-rsid="00146dff"/>
    </style:style>
    <style:style style:name="P5" style:family="paragraph" style:parent-style-name="Heading_20_1">
      <style:paragraph-properties style:writing-mode="lr-tb" style:writing-mode-automatic="false"/>
      <style:text-properties fo:language="ru" fo:country="RU" officeooo:rsid="0015bac9" officeooo:paragraph-rsid="0015bac9"/>
    </style:style>
    <style:style style:name="P6" style:family="paragraph" style:parent-style-name="Text_20_body">
      <style:paragraph-properties style:writing-mode="lr-tb" style:writing-mode-automatic="false"/>
      <style:text-properties fo:language="ru" fo:country="RU" officeooo:rsid="0015bac9" officeooo:paragraph-rsid="0015bac9"/>
    </style:style>
    <style:style style:name="P7" style:family="paragraph" style:parent-style-name="Text_20_body">
      <style:paragraph-properties style:writing-mode="lr-tb" style:writing-mode-automatic="false"/>
      <style:text-properties fo:language="ru" fo:country="RU" officeooo:rsid="0016a30f" officeooo:paragraph-rsid="0016a30f"/>
    </style:style>
    <style:style style:name="P8" style:family="paragraph" style:parent-style-name="Heading_20_1">
      <style:text-properties fo:language="ru" fo:country="RU" officeooo:rsid="00192477" officeooo:paragraph-rsid="00192477"/>
    </style:style>
    <style:style style:name="P9" style:family="paragraph" style:parent-style-name="Text_20_body">
      <style:paragraph-properties style:writing-mode="lr-tb" style:writing-mode-automatic="false"/>
      <style:text-properties fo:language="ru" fo:country="RU" officeooo:rsid="001aba8d" officeooo:paragraph-rsid="001aba8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ru" fo:country="RU" officeooo:rsid="00102dcc"/>
    </style:style>
    <style:style style:name="T5" style:family="text">
      <style:text-properties fo:language="ru" fo:country="RU" officeooo:rsid="00119bdc"/>
    </style:style>
    <style:style style:name="T6" style:family="text">
      <style:text-properties fo:language="ru" fo:country="RU" officeooo:rsid="00131205"/>
    </style:style>
    <style:style style:name="T7" style:family="text">
      <style:text-properties officeooo:rsid="00177e4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ac2b"/>
    </style:style>
    <style:style style:name="T10" style:family="text">
      <style:text-properties fo:font-weight="bold" officeooo:rsid="001bac2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иртуальный процессор <text:span text:style-name="T1">Basis.</text:span></text:p>
      <text:h text:style-name="Heading_20_1" text:outline-level="1">1. <text:span text:style-name="T2">Введение.</text:span></text:h>
      <text:p text:style-name="P2"><text:span text:style-name="T3">Basis</text:span> – <text:span text:style-name="T2">это виртуальный процессор, реализованный программно. Данный текст описывает систему команд и логическое устройство данного процессора. Он предназначен для учебных целей.</text:span></text:p>
      <text:p text:style-name="P3">Basis – 64-<text:span text:style-name="T2">разрядный многоядерный процессор </text:span><text:span text:style-name="T4">общего назначения</text:span><text:span text:style-name="T2">, поддерживающий защиту памяти и изоляцию процессов. </text:span><text:span text:style-name="T4">Не поддерживает плавающую арифметику. </text:span><text:span text:style-name="T5">Поддерживает интерфейс с внешними устройствами через регистры, отображённы</text:span><text:span text:style-name="T6">ми</text:span><text:span text:style-name="T5"> в память, и через общую с устройствами память.</text:span></text:p>
      <text:p text:style-name="P4">Процессор состоит из 3 логических контуров: блок ядер, подсистему памяти, интерфейс с основной памятью и внешними устройствами.</text:p>
      <text:h text:style-name="P5" text:outline-level="1">2. Блок ядер.</text:h>
      <text:p text:style-name="P6"><text:span text:style-name="T3">Блок ядер</text:span> состоит из нескольких процессорных ядер, кэша и системы виртуализации памяти.</text:p>
      <text:p text:style-name="P7"><text:span text:style-name="T3">Ядро</text:span> — основная исполняющая единица процессора. Оно извлекает команды из памяти и выполняет их. Ядро содержит набор регистров, вычислительные операции выполняются над содержимым регистров. Регистры могут быть записаны в память или прочитаны из памяти. Каждое ядро может находится в активном состоянии или быть остановлено. Все ядра нумеруются последовательно начиная с 0. На старте работает только ядро номер 0. Остальные ядра включаются специальной системной командой. <text:span text:style-name="T7">Работа процессора может быть остановлена специальной системной командой.</text:span></text:p>
      <text:h text:style-name="P8" text:outline-level="1">3. Физическое адресное пространство.</text:h>
      <text:p text:style-name="P9">Блок ядер связан с основной памятью и внешними устройствами. Обмен данных с основной памятью осуществляется <text:span text:style-name="T8">кэш-линейками</text:span> по 64 байта (это 8 64-<text:span text:style-name="T9">разрядных</text:span> слов). <text:span text:style-name="T9">Память логически состоит из байтов и адресуется 64-разрядным адресом. Внешняя память </text:span><text:span text:style-name="T10">банкуется</text:span><text:span text:style-name="T9"> для увеличения производительности при одновременном множественном доступе.</text:span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style:writing-mode="lr-tb" style:writing-mode-automatic="false"/>
      <style:text-properties fo:font-size="18pt" fo:language="en" fo:country="US" fo:font-weight="normal" officeooo:rsid="000e8f7f" fo:background-color="#fff5ce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8T05:56:40.067922100</meta:creation-date>
    <meta:generator>LibreOffice/26.2.4.2$Windows_X86_64 LibreOffice_project/0229ac93fcf0d7cbc6376066c6f35021cef002dc</meta:generator>
    <dc:date>2026-06-28T07:47:03.725747600</dc:date>
    <meta:editing-duration>PT1H23M37S</meta:editing-duration>
    <meta:editing-cycles>16</meta:editing-cycles>
    <meta:document-statistic meta:table-count="0" meta:image-count="0" meta:object-count="0" meta:page-count="1" meta:paragraph-count="10" meta:word-count="207" meta:character-count="1627" meta:non-whitespace-character-count="1427"/>
  </office:meta>
</office:document-meta>
</file>